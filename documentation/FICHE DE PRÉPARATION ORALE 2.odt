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loext:padding="0cm" loext:border="none"/>
    </style:style>
    <style:style style:name="P2" style:family="paragraph" style:parent-style-name="Text_20_body">
      <style:text-properties fo:color="#000000" loext:opacity="100%" style:font-name="Calibri" fo:font-size="12pt" loext:padding="0cm" loext:border="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fo:font-style="italic"/>
    </style:style>
    <style:style style:name="P7" style:family="paragraph" style:parent-style-name="Text_20_body" style:list-style-name="L3"/>
    <style:style style:name="P8" style:family="paragraph" style:parent-style-name="Text_20_body">
      <style:paragraph-properties fo:margin-left="1cm" fo:margin-right="1cm" fo:text-indent="0cm" style:auto-text-indent="false"/>
    </style:style>
    <style:style style:name="P9" style:family="paragraph" style:parent-style-name="Text_20_body" style:list-style-name="L4"/>
    <style:style style:name="P10" style:family="paragraph" style:parent-style-name="Text_20_body" style:list-style-name="L5"/>
    <style:style style:name="T1" style:family="text">
      <style:text-properties fo:font-style="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proton-root">
        <text:section text:style-name="Sect2" text:name="divtagdefaultwrapper">
          <text:h text:style-name="Heading_20_1" text:outline-level="1">📜 FICHE DE PRÉPARATION ORALE : PROJET "L'EMPREINTE"</text:h>
          <text:h text:style-name="Heading_20_2" text:outline-level="2">1. LA VISION : "Haute Couture &amp; Synchronicité"</text:h>
          <text:list xml:id="list3491233827" text:style-name="L1">
            <text:list-item>
              <text:p text:style-name="P4"><text:span text:style-name="Strong_20_Emphasis">L'Argument :</text:span> "Le site n'est pas un simple catalogue, c'est un parcours de <text:span text:style-name="Strong_20_Emphasis">Synchronicité</text:span>. Il accompagne le patient de la curiosité (Savoir) à l'échange (Dialogue), jusqu'à l'engagement (Soin)."</text:p>
            </text:list-item>
            <text:list-item>
              <text:p text:style-name="P4"><text:span text:style-name="Strong_20_Emphasis">La Particularité :</text:span> L'esthétique "Zen" utilise massivement le <text:span text:style-name="Strong_20_Emphasis">vide (le souffle)</text:span>. Chaque élément respire pour refléter le calme du cabinet de Sandrine.</text:p>
            </text:list-item>
          </text:list>
          <text:h text:style-name="Heading_20_2" text:outline-level="2">2. LA STACK TECHNIQUE : "State of the Art"</text:h>
          <text:list xml:id="list1440823468" text:style-name="L2">
            <text:list-item>
              <text:p text:style-name="P5"><text:span text:style-name="Strong_20_Emphasis">Le Choix :</text:span> Symfony 8 et PHP 8.4.</text:p>
            </text:list-item>
            <text:list-item>
              <text:p text:style-name="P5"><text:span text:style-name="Strong_20_Emphasis">Pourquoi ?</text:span> "J'ai choisi les versions les plus récentes pour garantir la pérennité du projet, une sécurité maximale et des performances de pointe (moteur JIT de PHP 8.4)."</text:p>
            </text:list-item>
            <text:list-item>
              <text:p text:style-name="P5"><text:span text:style-name="Strong_20_Emphasis">L'Infrastructure :</text:span> Docker avec <text:span text:style-name="Strong_20_Emphasis">FrankenPHP</text:span>. "C'est une solution moderne qui permet un déploiement rapide et une gestion simplifiée des ressources (PostgreSQL 14)."</text:p>
            </text:list-item>
          </text:list>
          <text:h text:style-name="Heading_20_2" text:outline-level="2">3. L'ARCHITECTURE DE DONNÉES (Le MCD)</text:h>
          <text:p text:style-name="P6">C'est ici que vous montrez votre maîtrise technique.</text:p>
          <text:list xml:id="list3803448531" text:style-name="L3">
            <text:list-item>
              <text:p text:style-name="P7"><text:span text:style-name="Strong_20_Emphasis">L'Identité (User) :</text:span> "J'utilise des <text:span text:style-name="Strong_20_Emphasis">UUID</text:span> au lieu d'ID classiques. C'est une norme de sécurité haute performance qui protège l'anonymat des patients dans les URLs."</text:p>
            </text:list-item>
            <text:list-item>
              <text:p text:style-name="P7"><text:span text:style-name="Strong_20_Emphasis">La Flexibilité (Roles) :</text:span> "Le champ json roles gère la hiérarchie. Sandrine est ROLE_ADMIN, Léa est ROLE_USER. Une seule table, mais des droits parfaitement étanches."</text:p>
            </text:list-item>
            <text:list-item>
              <text:p text:style-name="P7"><text:span text:style-name="Strong_20_Emphasis">L'Expertise (Treatment) :</text:span> "Le champ protocol_benefits en format TEXT permet de détailler l'expertise Namikoshi. On n'est pas dans le marketing, on est dans la transmission thérapeutique."</text:p>
            </text:list-item>
            <text:list-item>
              <text:p text:style-name="P7"><text:span text:style-name="Strong_20_Emphasis">La Pédagogie (Lexicon) :</text:span> "C'est la pièce maîtresse pour l'accessibilité. Le lexique est un service transversal qui éclaire les termes complexes de la MTC (Qi, Méridiens) au sein même des articles."</text:p>
            </text:list-item>
          </text:list>
          <text:h text:style-name="Heading_20_2" text:outline-level="2">4. LES PARTICULARITÉS À DÉFENDRE (Questions pièges)</text:h>
          <text:h text:style-name="Heading_20_3" text:outline-level="3">"Pourquoi une seule table pour le Sanctuaire et le Blog ?"</text:h>
          <text:p text:style-name="P8"><text:span text:style-name="Strong_20_Emphasis">Réponse :</text:span> "Par pragmatisme architectural. La structure d'un article est identique. La distinction se fait par le champ category. Cela simplifie la maintenance et optimise les performances de recherche."</text:p>
          <text:h text:style-name="Heading_20_3" text:outline-level="3"><text:soft-page-break/>"Pourquoi avoir intégré une barre de recherche dans le Lexique ?"</text:h>
          <text:p text:style-name="P8"><text:span text:style-name="Strong_20_Emphasis">Réponse :</text:span> "Pour l'expérience utilisateur (UX). La MTC est une science de 3 000 ans avec un jargon riche. La recherche prédictive permet au patient de trouver une définition instantanément, renforçant sa confiance envers la praticienne."</text:p>
          <text:h text:style-name="Heading_20_3" text:outline-level="3">"Comment gérez-vous la sécurité des paiements ?"</text:h>
          <text:p text:style-name="P8"><text:span text:style-name="Strong_20_Emphasis">Réponse :</text:span> "Par la table PAYMENT qui agit comme une preuve de transaction. Nous ne stockons aucune donnée bancaire sensible (conformité RGPD), seulement le stripe_id de référence externe."</text:p>
          <text:h text:style-name="Heading_20_2" text:outline-level="2">5. LE LEXIQUE ET LE "POPOVER"</text:h>
          <text:list xml:id="list4105930569" text:style-name="L4">
            <text:list-item>
              <text:p text:style-name="P9"><text:span text:style-name="Strong_20_Emphasis">Le concept :</text:span> Expliquez que vous avez choisi le <text:span text:style-name="Strong_20_Emphasis">Popover</text:span> (bulle d'info au clic) plutôt que de renvoyer systématiquement vers une autre page.</text:p>
            </text:list-item>
            <text:list-item>
              <text:p text:style-name="P9"><text:span text:style-name="Strong_20_Emphasis">L'avantage :</text:span> "Cela maintient le patient dans sa lecture et son état de relaxation (le flux). On informe sans interrompre."</text:p>
            </text:list-item>
          </text:list>
          <text:p text:style-name="Horizontal_20_Line"/>
          <text:h text:style-name="Heading_20_3" text:outline-level="3">CONSEIL POUR L'ORAL :</text:h>
          <text:p text:style-name="Text_20_body">Si le jury vous interroge sur la méthode : <text:span text:style-name="T1">"J'ai appliqué la règle 'Une chose à la fois'. J'ai d'abord 'terminalisé' mon design Figma, puis modélisé ma base de données avec Mermaid avant d'écrire la moindre ligne de code Symfony. Cette rigueur garantit que mon backend est le miroir exact de mes besoins métier."</text:span></text:p>
          <text:p text:style-name="Horizontal_20_Line"/>
          <text:p text:style-name="Text_20_body"><text:span text:style-name="Strong_20_Emphasis">Sommes-nous prêts à reprendre le terminal pour finir les 3 dernières entités ?</text:span><text:line-break/>Il nous reste :</text:p>
          <text:list xml:id="list2088147932" text:style-name="L5">
            <text:list-item>
              <text:p text:style-name="P10"><text:span text:style-name="Strong_20_Emphasis">TherapeuticExchange</text:span> (Le lien patient-admin)</text:p>
            </text:list-item>
            <text:list-item>
              <text:p text:style-name="P10"><text:span text:style-name="Strong_20_Emphasis">Appointment</text:span> (La prise de rendez-vous)</text:p>
            </text:list-item>
            <text:list-item>
              <text:p text:style-name="P10"><text:span text:style-name="Strong_20_Emphasis">GiftCard</text:span> (L'offre de soins)</text:p>
            </text:list-item>
          </text:list>
          <text:p text:style-name="Text_20_body"/>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1T13:02:47.944877115</meta:creation-date>
    <dc:date>2026-07-01T14:07:30.837638623</dc:date>
    <meta:editing-duration>PT59S</meta:editing-duration>
    <meta:editing-cycles>1</meta:editing-cycles>
    <meta:document-statistic meta:table-count="0" meta:image-count="0" meta:object-count="0" meta:page-count="2" meta:paragraph-count="30" meta:word-count="534" meta:character-count="3332" meta:non-whitespace-character-count="2842"/>
    <meta:generator>LibreOffice/7.3.7.2$Linux_X86_64 LibreOffice_project/30$Build-2</meta:generator>
  </office:meta>
</office:document-meta>
</file>