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2000000012CC919377172893FC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style="italic"/>
    </style:style>
    <style:style style:name="P2" style:family="paragraph" style:parent-style-name="Text_20_body">
      <style:paragraph-properties fo:margin-left="1cm" fo:margin-right="1cm" fo:text-indent="0cm" style:auto-text-indent="false"/>
      <style:text-properties fo:font-style="italic"/>
    </style:style>
    <style:style style:name="P3" style:family="paragraph" style:parent-style-name="Text_20_body">
      <style:text-properties fo:font-size="10.5pt" fo:font-style="italic" style:font-size-asian="10.5pt" style:font-size-complex="10.5pt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ARTIE III : ARCHITECTURE DES DONNÉES (MCD)</text:h>
      <text:h text:style-name="Heading_20_2" text:outline-level="2">1. Modélisation de la base de données</text:h>
      <text:p text:style-name="Text_20_body"><text:s text:c="4"/>Pour garantir la cohérence des informations et la pérennité du système, j’ai structuré la base de données selon un <text:span text:style-name="Strong_20_Emphasis">Modèle Conceptuel de Données (MCD)</text:span> rigoureux. Cette étape de conception a permis de traduire les besoins métier de Sandrine Tribhou (gestion des soins, pédagogie, transactions) en une structure technique optimisée.</text:p>
      <text:p text:style-name="Text_20_body"><text:s text:c="4"/>J'ai utilisé l'outil <text:span text:style-name="Strong_20_Emphasis">Mermaid.js</text:span> pour générer une représentation visuelle claire des entités et de leurs relations.</text:p>
      <text:h text:style-name="Heading_20_3" text:outline-level="3">1.1 Le Schéma Relationnel</text:h>
      <text:p text:style-name="P1"/>
      <text:p text:style-name="P1"/>
      <text:p text:style-name="P1"/>
      <text:p text:style-name="P1"><draw:frame draw:style-name="fr1" draw:name="Image1" text:anchor-type="char" svg:width="17.948cm" svg:height="9.55cm" draw:z-index="0"><draw:image xlink:href="Pictures/1000000100002000000012CC919377172893FC0F.png" xlink:type="simple" xlink:show="embed" xlink:actuate="onLoad" draw:mime-type="image/png"/></draw:frame></text:p>
      <text:p text:style-name="P1"/>
      <text:p text:style-name="P3"><text:s text:c="4"/>J'ai simplifié l'entité GiftCard en suivant les principes de normalisation : la distinction entre support physique et numérique est traitée par la couche applicative (Services), garantissant une base de données plus légère et plus robuste.</text:p>
      <text:p text:style-name="P1"/>
      <text:p text:style-name="P1"/>
      <text:h text:style-name="Heading_20_2" text:outline-level="2"><text:soft-page-break/>2. Analyse des Piliers du Domaine</text:h>
      <text:p text:style-name="Text_20_body"><text:s text:c="4"/>L'architecture se décline en quatre pôles majeurs, chacun répondant à une problématique spécifique du projet :</text:p>
      <text:list xml:id="list1673049740" text:style-name="L1">
        <text:list-item>
          <text:p text:style-name="P4"><text:span text:style-name="Strong_20_Emphasis">Le Pôle Identité (Entité User) :</text:span> Pivot central du système, il gère l'authentification sécurisée. Il intègre nativement la gestion du <text:span text:style-name="Strong_20_Emphasis">Wallet</text:span> (portefeuille numérique) et les droits d'accès via un format JSON.</text:p>
        </text:list-item>
        <text:list-item>
          <text:p text:style-name="P4"><text:span text:style-name="Strong_20_Emphasis">Le Pôle Expertise (Entités Treatment &amp; Lexicon) :</text:span> Ce pôle stocke le savoir-faire. Le Lexique est conçu de manière transversale pour enrichir dynamiquement les contenus du Sanctuaire et du Blog.</text:p>
        </text:list-item>
        <text:list-item>
          <text:p text:style-name="P4"><text:span text:style-name="Strong_20_Emphasis">Le Pôle Synchronicité (Entités Exchange &amp; Appointment) :</text:span> Il matérialise la relation thérapeutique en reliant l'historique des dialogues à la prise de rendez-vous effective.</text:p>
        </text:list-item>
        <text:list-item>
          <text:p text:style-name="P4"><text:span text:style-name="Strong_20_Emphasis">Le Pôle Économique (Entités GiftCard &amp; Payment) :</text:span> Il sécurise les flux financiers. Les cartes cadeaux sont gérées de manière hybride (format papier ou crédit numérique sur le Wallet).</text:p>
        </text:list-item>
      </text:list>
      <text:h text:style-name="Heading_20_2" text:outline-level="2">3. Choix techniques structurants</text:h>
      <text:p text:style-name="Text_20_body"><text:s text:c="4"/>Pour élever le niveau de sécurité et de précision du projet, j'ai adopté trois standards majeurs :</text:p>
      <text:list xml:id="list3728369325" text:style-name="L2">
        <text:list-item>
          <text:p text:style-name="P5"><text:span text:style-name="Strong_20_Emphasis">L'Identifiant UUID :</text:span> Chaque enregistrement dispose d'un identifiant universel complexe pour anonymiser les données patients.</text:p>
        </text:list-item>
        <text:list-item>
          <text:p text:style-name="P5"><text:span text:style-name="Strong_20_Emphasis">La Précision monétaire (Decimal) :</text:span> Les montants financiers (Wallet, Prix, Paiements) utilisent le type decimal (précision 10,2) pour garantir l'exactitude des centimes.</text:p>
        </text:list-item>
        <text:list-item>
          <text:p text:style-name="P5"><text:span text:style-name="Strong_20_Emphasis">L'Intégrité Relationnelle :</text:span> L'utilisation de clés étrangères et de contraintes d'unicité (ex: code haché des cartes cadeaux) empêche toute corruption de données.</text:p>
        </text:list-item>
      </text:list>
      <text:p text:style-name="Horizontal_20_Line"/>
      <text:h text:style-name="Heading_20_3" text:outline-level="3">💡 Le conseil "Pro" pour votre oral :</text:h>
      <text:p text:style-name="Text_20_body">Si le jury pointe votre schéma Mermaid, dites simplement :</text:p>
      <text:p text:style-name="P2">"Mon architecture n'est pas une simple liste de tables. Chaque lien est une 'couture' qui assure la Synchronicité. Par exemple, une GiftCard est reliée à la fois au soin offert et au Wallet du bénéficiaire, ce qui permet un suivi automatisé et sans erreur."</text:p>
      <text:p text:style-name="Text_20_body"><text:span text:style-name="Strong_20_Emphasis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7T14:30:08.851322451</meta:creation-date>
    <dc:date>2026-07-10T09:26:15.477970814</dc:date>
    <meta:editing-duration>PT10M16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2" meta:paragraph-count="20" meta:word-count="403" meta:character-count="2648" meta:non-whitespace-character-count="2252"/>
  </office:meta>
</office:document-meta>
</file>