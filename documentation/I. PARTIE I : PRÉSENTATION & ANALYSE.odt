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3000010890AB4A9555C392A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face style:name="Cormorant Garamond1" svg:font-family="'Cormorant Garamond'" style:font-pitch="variable"/>
    <style:font-face style:name="EB Garamond" svg:font-family="'EB Garamond'"/>
    <style:font-face style:name="EB Garamond1" svg:font-family="'EB Garamond'"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c7fe"/>
    </style:style>
    <style:style style:name="P2" style:family="paragraph" style:parent-style-name="Horizontal_20_Line">
      <style:text-properties officeooo:paragraph-rsid="001fc7fe"/>
    </style:style>
    <style:style style:name="P3" style:family="paragraph" style:parent-style-name="Text_20_body">
      <style:text-properties fo:font-style="italic" officeooo:paragraph-rsid="001fc7fe"/>
    </style:style>
    <style:style style:name="P4" style:family="paragraph" style:parent-style-name="Standard">
      <style:text-properties officeooo:paragraph-rsid="002095a2"/>
    </style:style>
    <style:style style:name="P5" style:family="paragraph" style:parent-style-name="Text_20_body">
      <style:text-properties officeooo:paragraph-rsid="002095a2"/>
    </style:style>
    <style:style style:name="P6" style:family="paragraph" style:parent-style-name="Heading_20_1">
      <style:text-properties officeooo:paragraph-rsid="002095a2"/>
    </style:style>
    <style:style style:name="P7" style:family="paragraph" style:parent-style-name="Heading_20_2">
      <style:text-properties style:font-name="Cormorant Garamond1" fo:font-size="24pt" fo:font-style="italic" officeooo:paragraph-rsid="001fc7fe" style:font-size-asian="24pt" style:font-style-asian="italic" style:font-size-complex="24pt" style:font-style-complex="italic"/>
    </style:style>
    <style:style style:name="P8" style:family="paragraph" style:parent-style-name="Heading_20_2">
      <style:text-properties style:font-name="Cormorant Garamond1" fo:font-size="18pt" officeooo:paragraph-rsid="001fc7fe" style:font-size-asian="18pt" style:font-size-complex="18pt"/>
    </style:style>
    <style:style style:name="P9" style:family="paragraph" style:parent-style-name="Heading_20_3">
      <style:text-properties officeooo:paragraph-rsid="001fc7fe"/>
    </style:style>
    <style:style style:name="P10" style:family="paragraph" style:parent-style-name="Heading_20_3">
      <style:text-properties style:font-name="Cormorant Garamond1" fo:font-size="16pt" fo:font-style="normal" officeooo:paragraph-rsid="001fc7fe" style:font-size-asian="16pt" style:font-style-asian="normal" style:font-size-complex="16pt" style:font-style-complex="normal"/>
    </style:style>
    <style:style style:name="P11" style:family="paragraph" style:parent-style-name="Heading_20_3">
      <style:text-properties style:font-name="Cormorant Garamond1" fo:font-size="18pt" officeooo:paragraph-rsid="001fc7fe" style:font-size-asian="18pt" style:font-size-complex="18pt"/>
    </style:style>
    <style:style style:name="P12" style:family="paragraph" style:parent-style-name="Text_20_body" style:list-style-name="L1">
      <style:text-properties officeooo:paragraph-rsid="001fc7fe"/>
    </style:style>
    <style:style style:name="P13" style:family="paragraph" style:parent-style-name="Text_20_body" style:list-style-name="L2">
      <style:text-properties officeooo:paragraph-rsid="001fc7fe"/>
    </style:style>
    <style:style style:name="P14" style:family="paragraph" style:parent-style-name="Text_20_body" style:list-style-name="L3">
      <style:text-properties officeooo:paragraph-rsid="001fc7f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text-properties style:font-name="EB Garamond1" officeooo:paragraph-rsid="002095a2"/>
    </style:style>
    <style:style style:name="P20" style:family="paragraph" style:parent-style-name="Text_20_body">
      <style:text-properties style:font-name="Cormorant Garamond1" officeooo:paragraph-rsid="002095a2"/>
    </style:style>
    <style:style style:name="P21" style:family="paragraph" style:parent-style-name="Text_20_body">
      <style:text-properties officeooo:paragraph-rsid="001fc7fe"/>
    </style:style>
    <style:style style:name="T1" style:family="text">
      <style:text-properties fo:font-weight="normal" style:font-weight-asian="normal" style:font-weight-complex="normal"/>
    </style:style>
    <style:style style:name="T2" style:family="text">
      <style:text-properties fo:font-weight="normal" officeooo:rsid="001e4de6" style:font-weight-asian="normal" style:font-weight-complex="normal"/>
    </style:style>
    <style:style style:name="T3" style:family="text">
      <style:text-properties officeooo:rsid="001fc7fe"/>
    </style:style>
    <style:style style:name="T4" style:family="text">
      <style:text-properties fo:font-size="18pt" style:font-size-asian="18pt" style:font-size-complex="18pt"/>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d455b"/>
    </style:style>
    <style:style style:name="T8" style:family="text">
      <style:text-properties fo:font-weight="bold" officeooo:rsid="001e4de6" style:font-weight-asian="bold" style:font-weight-complex="bold"/>
    </style:style>
    <style:style style:name="T9" style:family="text">
      <style:text-properties style:font-name="Cormorant Garamond1"/>
    </style:style>
    <style:style style:name="T10" style:family="text">
      <style:text-properties style:font-name="Cormorant Garamond1" fo:font-style="italic" style:font-style-asian="italic" style:font-style-complex="italic"/>
    </style:style>
    <style:style style:name="T11" style:family="text">
      <style:text-properties style:font-name="Cormorant Garamond1" fo:font-style="italic" fo:font-weight="bold" style:font-style-asian="italic" style:font-weight-asian="bold" style:font-style-complex="italic" style:font-weight-complex="bold"/>
    </style:style>
    <style:style style:name="T12" style:family="text">
      <style:text-properties style:font-name="Cormorant Garamond1" fo:font-size="18pt" style:font-size-asian="18pt" style:font-size-complex="18pt"/>
    </style:style>
    <style:style style:name="T13" style:family="text">
      <style:text-properties style:font-name="Cormorant Garamond1" fo:font-size="18pt" fo:font-style="italic" style:font-size-asian="18pt" style:font-style-asian="italic" style:font-size-complex="18pt" style:font-style-complex="italic"/>
    </style:style>
    <style:style style:name="T14" style:family="text">
      <style:text-properties style:font-name="Cormorant Garamond1" fo:font-size="18pt" fo:font-style="italic" fo:font-weight="bold" style:font-size-asian="18pt" style:font-style-asian="italic" style:font-weight-asian="bold" style:font-size-complex="18pt" style:font-style-complex="italic" style:font-weight-complex="bold"/>
    </style:style>
    <style:style style:name="T15" style:family="text">
      <style:text-properties style:font-name="Cormorant Garamond1" fo:font-size="14pt" style:font-size-asian="14pt" style:font-size-complex="14pt"/>
    </style:style>
    <style:style style:name="T16" style:family="text">
      <style:text-properties style:font-name="Cormorant Garamond1" fo:font-size="14pt" fo:font-style="italic" style:font-size-asian="14pt" style:font-style-asian="italic" style:font-size-complex="14pt" style:font-style-complex="italic"/>
    </style:style>
    <style:style style:name="T17" style:family="text">
      <style:text-properties style:font-name="Cormorant Garamond1" fo:font-size="14pt" fo:font-style="italic" fo:font-weight="bold" style:font-size-asian="14pt" style:font-style-asian="italic" style:font-weight-asian="bold" style:font-size-complex="14pt" style:font-style-complex="italic" style:font-weight-complex="bold"/>
    </style:style>
    <style:style style:name="T18" style:family="text">
      <style:text-properties style:font-name="Cormorant Garamond1" fo:font-size="14pt" fo:font-weight="bold" style:font-size-asian="14pt" style:font-weight-asian="bold" style:font-size-complex="14pt" style:font-weight-complex="bold"/>
    </style:style>
    <style:style style:name="T19" style:family="text">
      <style:text-properties style:font-name="Cormorant Garamond1" fo:font-size="16pt" fo:font-style="italic" style:font-size-asian="16pt" style:font-style-asian="italic" style:font-size-complex="16pt" style:font-style-complex="italic"/>
    </style:style>
    <style:style style:name="T20" style:family="text">
      <style:text-properties style:font-name="Cormorant Garamond1" fo:font-size="16pt" officeooo:rsid="001fc7fe" style:font-size-asian="16pt" style:font-size-complex="16pt"/>
    </style:style>
    <style:style style:name="T21" style:family="text">
      <style:text-properties style:font-name="Cormorant Garamond1" fo:font-size="16pt" fo:font-style="normal" style:font-size-asian="16pt" style:font-style-asian="normal" style:font-size-complex="16pt" style:font-style-complex="normal"/>
    </style:style>
    <style:style style:name="T22" style:family="text">
      <style:text-properties style:font-name="Cormorant Garamond1" fo:font-size="32pt" fo:font-style="italic" style:font-size-asian="32pt" style:font-style-asian="italic" style:font-size-complex="32pt" style:font-style-complex="italic"/>
    </style:style>
    <style:style style:name="T23" style:family="text">
      <style:text-properties style:font-name="Cormorant Garamond1" fo:font-size="24pt" fo:font-style="italic" style:font-size-asian="24pt" style:font-style-asian="italic" style:font-size-complex="24pt" style:font-style-complex="italic"/>
    </style:style>
    <style:style style:name="T24" style:family="text">
      <style:text-properties style:font-name="EB Garamond1"/>
    </style:style>
    <style:style style:name="T25" style:family="text">
      <style:text-properties style:font-name="EB Garamond1" fo:font-size="14pt" style:font-size-asian="14pt" style:font-size-complex="14pt"/>
    </style:style>
    <style:style style:name="T26" style:family="text">
      <style:text-properties style:font-name="EB Garamond1" fo:font-size="14pt" fo:font-weight="normal" style:font-size-asian="14pt" style:font-weight-asian="normal" style:font-size-complex="14pt" style:font-weight-complex="normal"/>
    </style:style>
    <style:style style:name="T27" style:family="text">
      <style:text-properties style:font-name="EB Garamond1" fo:font-size="14pt" fo:font-weight="bold" style:font-size-asian="14pt" style:font-weight-asian="bold" style:font-size-complex="14pt" style:font-weight-complex="bold"/>
    </style:style>
    <style:style style:name="T28" style:family="text">
      <style:text-properties style:font-name="EB Garamond1" officeooo:rsid="001d455b"/>
    </style:style>
    <style:style style:name="T29" style:family="text">
      <style:text-properties style:font-name="EB Garamond1" fo:font-weight="normal" officeooo:rsid="001e4de6" style:font-weight-asian="normal" style:font-weight-complex="normal"/>
    </style:style>
    <style:style style:name="T30" style:family="text">
      <style:text-properties style:font-name="EB Garamond1" fo:font-weight="bold" officeooo:rsid="001e4de6"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Strong_20_Emphasis"><text:span text:style-name="T22">PARTIE I : PRÉSENTATION &amp; ANALYSE</text:span></text:span></text:h>
      <text:p text:style-name="P5"><text:span text:style-name="Strong_20_Emphasis"/></text:p>
      <text:p text:style-name="P5"><text:span text:style-name="Strong_20_Emphasis"><text:span text:style-name="T23">1. Contexte du projet</text:span></text:span></text:p>
      <text:p text:style-name="P5"><text:span text:style-name="Strong_20_Emphasis"><text:span text:style-name="T4"/></text:span></text:p>
      <text:p text:style-name="P5"><text:span text:style-name="Strong_20_Emphasis"><text:span text:style-name="T14">1.1 L'origine : La rencontre entre tradition et modernité pour l’exercice des soins</text:span></text:span></text:p>
      <text:p text:style-name="P5"><text:span text:style-name="T24"><text:line-break/> <text:s text:c="3"/>Le projet </text:span><text:span text:style-name="Strong_20_Emphasis"><text:span text:style-name="T24">"L'EMPREINTE"</text:span></text:span><text:span text:style-name="T24"> naît de la volonté de Sandrine Tribhou, praticienne en Shiatsu Traditionnel Namikoshi et Médecine Traditionnelle Chinoise (MTC) à Toulouse et Tournefeuille.</text:span></text:p>
      <text:p text:style-name="P5"><text:span text:style-name="T24"><text:line-break/> <text:s text:c="3"/>Le constat de départ était simple : le cabinet disposait d'une présence web, mais celle-ci ne reflétait plus l'excellence et la sérénité de l'approche </text:span><text:span text:style-name="T28">thérapeutique </text:span><text:span text:style-name="T24">proposée. Il était nécessaire d'évoluer vers un véritable </text:span><text:span text:style-name="Strong_20_Emphasis"><text:span text:style-name="T24">écosystème numérique Haute Couture</text:span></text:span><text:span text:style-name="T24">, alliant rigueur professionnelle et prestige. L'enjeu est de traduire visuellement le "souffle" (le Qi) et la précision du geste Namikoshi à travers une interface </text:span><text:span text:style-name="Strong_20_Emphasis"><text:span text:style-name="T29">privilégiant une esthétique </text:span></text:span><text:span text:style-name="Strong_20_Emphasis"><text:span text:style-name="T30">épurée</text:span></text:span><text:span text:style-name="Strong_20_Emphasis"><text:span text:style-name="T29">.</text:span></text:span></text:p>
      <text:p text:style-name="P19"/>
      <text:p text:style-name="P5"><text:span text:style-name="T24"><text:s text:c="4"/>Pour la praticienne, l'objectif est d'atteindre une </text:span><text:span text:style-name="Strong_20_Emphasis"><text:span text:style-name="T24">autonomie totale sans obstacle technique</text:span></text:span><text:span text:style-name="T24">. Cela inclut la gestion fluide de l'échange thérapeutique, de l'agenda, des cartes cadeaux, du lexique et de ses articles de fond, centralisant ainsi tout son pilotage métier.</text:span></text:p>
      <text:p text:style-name="P20"/>
      <text:p text:style-name="P5"><text:span text:style-name="Strong_20_Emphasis"><text:span text:style-name="T13">1.2 La mission : Créer la "Synchronicité"</text:span></text:span></text:p>
      <text:p text:style-name="P5"><text:line-break/><text:span text:style-name="T24"> <text:s text:c="3"/>L'application dépasse la simple présentation de protocoles ; elle engage le patient dans un parcours fluide dont </text:span><text:span text:style-name="Strong_20_Emphasis"><text:span text:style-name="T24">l'acte thérapeutique commence dès les premières communications</text:span></text:span><text:span text:style-name="T24"> via la messagerie sécurisée. Mon travail a consisté à concevoir une plateforme où chaque étape (lecture d'un article, compréhension d'un terme technique, échange de messages) converge naturellement vers l'acte de soin physique. C'est ce que nous avons nommé le </text:span><text:span text:style-name="Strong_20_Emphasis"><text:span text:style-name="T24">Flux de Synchronicité</text:span></text:span><text:span text:style-name="T24">.</text:span></text:p>
      <text:p text:style-name="P4"/>
      <text:h text:style-name="P7" text:outline-level="2"><text:soft-page-break/>2. Objectifs du projet</text:h>
      <text:p text:style-name="P1"/>
      <text:p text:style-name="P1"><text:s text:c="4"/>Pour répondre aux besoins de Sandrine et de ses patients, j'ai fixé quatre objectifs majeurs :</text:p>
      <text:list xml:id="list74862719" text:style-name="L1">
        <text:list-item>
          <text:p text:style-name="P12"><text:span text:style-name="Strong_20_Emphasis">Architecture de pointe :</text:span> Développer une base de données relationnelle robuste (PostgreSQL) capable de gérer l'historique complet de la relation patient.</text:p>
        </text:list-item>
        <text:list-item>
          <text:p text:style-name="P12"><text:span text:style-name="Strong_20_Emphasis">Transmission du Savoir :</text:span> Automatiser la pédagogie grâce à un "Sanctuaire" (espace de savoir) et un Lexique dynamique, rendant la MTC accessible à tous sans rompre le flux de lecture.</text:p>
        </text:list-item>
        <text:list-item>
          <text:p text:style-name="P12"><text:span text:style-name="Strong_20_Emphasis">Gestion Métier Exclusive :</text:span> Intégrer des outils transactionnels innovants, tels que le <text:span text:style-name="Strong_20_Emphasis">Wallet</text:span> (portefeuille numérique) et la génération de cartes cadeaux hachées.</text:p>
        </text:list-item>
        <text:list-item>
          <text:p text:style-name="P12"><text:span text:style-name="Strong_20_Emphasis">Expérience Utilisateur "Zen" :</text:span> Utiliser la puissance de Tailwind v4 pour créer une interface ultra-rapide et épurée, où le vide graphique sert de respiration au visiteur.</text:p>
        </text:list-item>
      </text:list>
      <text:h text:style-name="P7" text:outline-level="2" text:is-list-header="true">3. Public Cible (Les Personas)</text:h>
      <text:p text:style-name="P1"/>
      <text:p text:style-name="P1"><text:s text:c="4"/>Pour valider mes choix de design et de fonctionnalités, j'ai modélisé deux types d'utilisateurs :</text:p>
      <text:list xml:id="list4169442549" text:style-name="L2">
        <text:list-item>
          <text:p text:style-name="P13"><text:span text:style-name="Strong_20_Emphasis">Le Patient en quête d'équilibre :</text:span> (Persona "Léa") Actif, urbain, souvent stressé, cherchant une prise en charge globale et une interface simple qui ne rajoute pas de charge mentale.</text:p>
        </text:list-item>
        <text:list-item>
          <text:p text:style-name="P13"><text:span text:style-name="Strong_20_Emphasis">L'Administratrice Experte :</text:span> (Persona "Sandrine") Ayant besoin d'un outil de pilotage centralisé pour gérer ses contenus et ses rendez-vous sans avoir besoin de compétences techniques avancées.</text:p>
        </text:list-item>
        <text:list-item>
          <text:p text:style-name="P13">💡 Le conseil "Pro" pour votre oral :</text:p>
        </text:list-item>
      </text:list>
      <text:p text:style-name="P1"><text:s text:c="4"/>Quand vous présenterez ce chapitre, insistez sur le mot <text:span text:style-name="Strong_20_Emphasis">"Écosystème"</text:span>. Expliquez que vous n'avez pas construit une "boutique", mais un <text:span text:style-name="Strong_20_Emphasis"><text:span text:style-name="T1">Portail de la relation thérapeutique</text:span></text:span> ou d'un <text:span text:style-name="Strong_20_Emphasis"><text:span text:style-name="T1">Prolongement numérique du cabinet</text:span></text:span><text:span text:style-name="T1">.</text:span> Le jury verra tout de suite que vous avez une vision métier globale, et pas seulement technique.</text:p>
      <text:p text:style-name="P1"/>
      <text:h text:style-name="P7" text:outline-level="2">4. Analyse fonctionnelle (Use Case)</text:h>
      <text:p text:style-name="P1"><text:span text:style-name="T19"/></text:p>
      <text:p text:style-name="P1"><text:s text:c="4"/>Pour concevoir une interface qui respecte la fluidité du parcours patient, j'ai réalisé un <text:span text:style-name="Strong_20_Emphasis">Diagramme de Cas d'Utilisation (UML)</text:span>. Ce travail d'analyse a permis d'identifier précisément les interactions <text:span text:style-name="T3">entre les trois types d’acteurs de l’écosystème.</text:span></text:p>
      <text:p text:style-name="P1"/>
      <text:h text:style-name="P8" text:outline-level="2"><text:soft-page-break/>4.<text:span text:style-name="T3">1 Identification des Acteurs</text:span></text:h>
      <text:p text:style-name="P1"><text:span text:style-name="T20"/></text:p>
      <text:list xml:id="list935293987" text:style-name="L3">
        <text:list-item>
          <text:p text:style-name="P14"><text:span text:style-name="Strong_20_Emphasis">L'Internaute (Visiteur) :</text:span> Il est en phase de découverte. Il consulte l'approche de Sandrine, parcourt le catalogue des soins et le Sanctuaire pour s'informer sur la MTC.</text:p>
        </text:list-item>
        <text:list-item>
          <text:p text:style-name="P14"><text:span text:style-name="Strong_20_Emphasis">Le Patient (Utilisateur authentifié) :</text:span> Il est engagé dans une démarche de soin. Il dispose d'un espace personnel pour dialoguer avec la thérapeute (Synchronicité) et peut transformer son intention en acte en prenant rendez-vous via l'agenda.</text:p>
        </text:list-item>
        <text:list-item>
          <text:p text:style-name="P14"><text:span text:style-name="Strong_20_Emphasis">L'Administratrice (Sandrine) :</text:span> Elle pilote l'ensemble. Elle gère les contenus pédagogiques, répond aux messages et assure la gestion financière du cabinet via le Wallet.</text:p>
          <text:p text:style-name="P14"/>
        </text:list-item>
      </text:list>
      <text:h text:style-name="P11" text:outline-level="3" text:is-list-header="true">4.2 La Synchronicité en action</text:h>
      <text:p text:style-name="P1"/>
      <text:p text:style-name="P1"><text:s text:c="4"/>Le point central de cette analyse est le passage du statut de « Visiteur » à celui de « Patient ».<text:line-break/>Contrairement à un site classique, l'action <text:span text:style-name="Strong_20_Emphasis">« Initier un échange »</text:span> est le pivot. Ce cas d'utilisation déclenche l'ouverture automatique d'un espace personnel, archivant les mots du patient pour que Sandrine puisse les intégrer à son diagnostic avant même la rencontre physique.</text:p>
      <text:p text:style-name="P3"><draw:frame draw:style-name="fr1" draw:name="Image1" text:anchor-type="char" svg:width="16.185cm" svg:height="29.7cm" draw:z-index="0"><draw:image xlink:href="Pictures/1000000100000903000010890AB4A9555C392AB8.png" xlink:type="simple" xlink:show="embed" xlink:actuate="onLoad" draw:mime-type="image/png"/></draw:frame><text:soft-page-break/></text:p>
      <text:p text:style-name="P3"><text:soft-page-break/></text:p>
      <text:p text:style-name="P2"/>
      <text:h text:style-name="P9" text:outline-level="3">💡 Le conseil "Pro" pour votre oral :</text:h>
      <text:p text:style-name="P3">Si le jury vous demande pourquoi avoir séparé le « Visiteur » du « Patient » dans votre schéma :<text:line-break/><text:span text:style-name="Strong_20_Emphasis">Réponse :</text:span> « C'est une question de respect de la confidentialité et de profondeur de la relation. Le visiteur accède au savoir public, mais le patient entre dans un sanctuaire sécurisé où ses mots et son historique de soin sont protégés et valorisés. »</text:p>
      <text:p text:style-name="P3"/>
      <text:h text:style-name="P10" text:outline-level="3">4.3 Spécifications Fonctionnelles (Epics &amp; User Stories)</text:h>
      <text:p text:style-name="P1"><text:span text:style-name="T21"/></text:p>
      <text:p text:style-name="Text_20_body">Pour structurer le développement, j’ai découpé les besoins du projet en <text:span text:style-name="Strong_20_Emphasis">Epics</text:span> (thématiques majeures) et en <text:span text:style-name="Strong_20_Emphasis">User Stories</text:span> (besoins précis des utilisateurs).</text:p>
      <text:p text:style-name="Text_20_body"/>
      <text:h text:style-name="Heading_20_4" text:outline-level="4"><text:span text:style-name="Strong_20_Emphasis"><text:span text:style-name="T16">Epic 1 : Le Sanctuaire &amp; La Pédagogie</text:span></text:span></text:h>
      <text:p text:style-name="Text_20_body"><text:span text:style-name="Strong_20_Emphasis"/></text:p>
      <text:list xml:id="list1492229123" text:style-name="L4">
        <text:list-item>
          <text:p text:style-name="P15"><text:span text:style-name="Strong_20_Emphasis">US 1 :</text:span> En tant que visiteur, je veux consulter des articles sur la MTC pour comprendre l'approche de Sandrine.</text:p>
        </text:list-item>
        <text:list-item>
          <text:p text:style-name="P15"><text:span text:style-name="Strong_20_Emphasis">US 2 :</text:span> En tant que lecteur, je veux accéder à un lexique interactif pour comprendre les termes techniques japonais ou chinois sans interrompre ma lecture.</text:p>
        </text:list-item>
        <text:list-item>
          <text:p text:style-name="P15"><text:span text:style-name="Strong_20_Emphasis">US 3 :</text:span> En tant qu'utilisateur, je veux rechercher un sujet précis via une barre de recherche globale.</text:p>
          <text:p text:style-name="P15"/>
        </text:list-item>
      </text:list>
      <text:h text:style-name="Heading_20_4" text:outline-level="4"><text:span text:style-name="Strong_20_Emphasis"><text:span text:style-name="T16">Epic 2 : La Synchronicité (Relation Thérapeutique)</text:span></text:span></text:h>
      <text:p text:style-name="Text_20_body"><text:span text:style-name="Strong_20_Emphasis"/></text:p>
      <text:list xml:id="list3646938464" text:style-name="L5">
        <text:list-item>
          <text:p text:style-name="P16"><text:span text:style-name="Strong_20_Emphasis">US 4 :</text:span> En tant que visiteur, je veux exprimer mon besoin via un formulaire sécurisé pour initier un premier échange thérapeutique.</text:p>
        </text:list-item>
        <text:list-item>
          <text:p text:style-name="P16"><text:span text:style-name="Strong_20_Emphasis">US 5 :</text:span> En tant que patient, je veux accéder à mon historique de dialogue pour retrouver les conseils de Sandrine.</text:p>
        </text:list-item>
        <text:list-item>
          <text:p text:style-name="P16"><text:span text:style-name="Strong_20_Emphasis">US 6 :</text:span> En tant que visiteur, je veux localiser le cabinet sur une carte interactive et lancer un itinéraire GPS pour me rendre au rendez-vous.</text:p>
        </text:list-item>
      </text:list>
      <text:h text:style-name="Heading_20_4" text:outline-level="4"><text:span text:style-name="Strong_20_Emphasis"><text:span text:style-name="T16">Epic 3 : L'Engagement (Réservation &amp; Économie Zen)</text:span></text:span></text:h>
      <text:p text:style-name="Text_20_body"><text:span text:style-name="Strong_20_Emphasis"/></text:p>
      <text:list xml:id="list4024047348" text:style-name="L6">
        <text:list-item>
          <text:p text:style-name="P17"><text:soft-page-break/><text:span text:style-name="Strong_20_Emphasis">US 7 :</text:span> En tant que patient, je veux choisir un créneau dans l'agenda pour valider mon rendez-vous physique.</text:p>
        </text:list-item>
        <text:list-item>
          <text:p text:style-name="P17"><text:span text:style-name="Strong_20_Emphasis">US 8 :</text:span> En tant qu'utilisateur, je veux acheter une "Expérience" (carte cadeau) et choisir entre une impression physique ou un crédit sur le Wallet d'un proche.</text:p>
        </text:list-item>
        <text:list-item>
          <text:p text:style-name="P17"><text:span text:style-name="Strong_20_Emphasis">US 9 :</text:span> En tant que patient, je veux consulter le solde de mon Wallet pour connaître mes soins restants.</text:p>
          <text:p text:style-name="P17"/>
        </text:list-item>
      </text:list>
      <text:h text:style-name="Heading_20_4" text:outline-level="4"><text:span text:style-name="Strong_20_Emphasis"><text:span text:style-name="T16">Epic 4 : L'Administration (Le Pilotage du Cabinet)</text:span></text:span></text:h>
      <text:p text:style-name="Text_20_body"><text:span text:style-name="Strong_20_Emphasis"/></text:p>
      <text:list xml:id="list107191169" text:style-name="L7">
        <text:list-item>
          <text:p text:style-name="P18"><text:span text:style-name="Strong_20_Emphasis">US 10 :</text:span> En tant qu'admin, je veux gérer l'intégralité du catalogue de soins (ajout, modification de tarifs, désactivation).</text:p>
        </text:list-item>
        <text:list-item>
          <text:p text:style-name="P18"><text:span text:style-name="Strong_20_Emphasis">US 11 :</text:span> En tant qu'admin, je veux rédiger, modifier ou mettre en brouillon mes articles et mon lexique en toute autonomie.</text:p>
        </text:list-item>
        <text:list-item>
          <text:p text:style-name="P18"><text:span text:style-name="Strong_20_Emphasis">US 12 :</text:span> En tant qu'admin, je veux générer des codes hachés uniques pour les cartes cadeaux et créditer manuellement le compte des patients (gestion des forfaits).</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face style:name="Cormorant Garamond1" svg:font-family="'Cormorant Garamond'" style:font-pitch="variable"/>
    <style:font-face style:name="EB Garamond" svg:font-family="'EB Garamond'"/>
    <style:font-face style:name="EB Garamond1" svg:font-family="'EB Garamond'"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EB Garamond"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ormorant Garamond" fo:font-family="'Cormorant Garamond'"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4:10:56.391785786</meta:creation-date>
    <dc:date>2026-07-10T13:38:40.754064835</dc:date>
    <meta:editing-duration>PT3H38M33S</meta:editing-duration>
    <meta:editing-cycles>5</meta:editing-cycles>
    <meta:generator>LibreOffice/7.3.7.2$Linux_X86_64 LibreOffice_project/30$Build-2</meta:generator>
    <meta:document-statistic meta:table-count="0" meta:image-count="1" meta:object-count="0" meta:page-count="6" meta:paragraph-count="51" meta:word-count="1097" meta:character-count="6842" meta:non-whitespace-character-count="5779"/>
  </office:meta>
</office:document-meta>
</file>