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T1"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Voici votre <text:span text:style-name="Strong_20_Emphasis">Fiche de Synthèse Orale</text:span>. Elle est conçue pour vous permettre de justifier chaque choix technique et artistique devant un jury ou un client, en utilisant le vocabulaire précis du projet <text:span text:style-name="Strong_20_Emphasis">"L'EMPREINTE"</text:span>.</text:p>
      <text:p text:style-name="Horizontal_20_Line"/>
      <text:h text:style-name="Heading_20_1" text:outline-level="1">📜 FICHE RÉCAPITULATIVE : PROJET "L'EMPREINTE"</text:h>
      <text:h text:style-name="Heading_20_2" text:outline-level="2">1. LE CONCEPT GÉNÉRATEUR : "La Synchronicité"</text:h>
      <text:list xml:id="list2879448066" text:style-name="L1">
        <text:list-item>
          <text:p text:style-name="P1"><text:span text:style-name="Strong_20_Emphasis">L’idée :</text:span> "L'EMPREINTE" n'est pas un site vitrine, c'est un <text:span text:style-name="Strong_20_Emphasis">écosystème thérapeutique</text:span>.</text:p>
        </text:list-item>
        <text:list-item>
          <text:p text:style-name="P1"><text:span text:style-name="Strong_20_Emphasis">L'argument :</text:span> Le parcours utilisateur suit une progression logique : <text:span text:style-name="Strong_20_Emphasis">Savoir</text:span> (Sanctuaire/Blog) ➔ <text:span text:style-name="Strong_20_Emphasis">Confiance</text:span> (Lexique/Approche) ➔ <text:span text:style-name="Strong_20_Emphasis">Dialogue</text:span> (Échanges) ➔ <text:span text:style-name="Strong_20_Emphasis">Engagement</text:span> (Agenda/Paiement).</text:p>
        </text:list-item>
        <text:list-item>
          <text:p text:style-name="P1"><text:span text:style-name="Strong_20_Emphasis">Le mot-clé :</text:span> "Haute Couture". Tout est sur-mesure pour refléter la précision du Shiatsu Namikoshi.</text:p>
        </text:list-item>
      </text:list>
      <text:h text:style-name="Heading_20_2" text:outline-level="2">2. L'ARCHITECTURE TECHNIQUE (La Stack)</text:h>
      <text:list xml:id="list3390312605" text:style-name="L2">
        <text:list-item>
          <text:p text:style-name="P2"><text:span text:style-name="Strong_20_Emphasis">Moteur :</text:span> PHP 8.4 et Symfony 8 (Dernières versions pour la performance et la sécurité).</text:p>
        </text:list-item>
        <text:list-item>
          <text:p text:style-name="P2"><text:span text:style-name="Strong_20_Emphasis">Infrastructure :</text:span> Docker Desktop avec <text:span text:style-name="Strong_20_Emphasis">FrankenPHP</text:span> (serveur ultra-rapide en Go).</text:p>
        </text:list-item>
        <text:list-item>
          <text:p text:style-name="P2"><text:span text:style-name="Strong_20_Emphasis">Base de Données :</text:span> PostgreSQL 14 (Robuste et adaptée aux relations complexes).</text:p>
        </text:list-item>
        <text:list-item>
          <text:p text:style-name="P2"><text:span text:style-name="Strong_20_Emphasis">Design :</text:span> Tailwind v4 avec moteur Rust (Compilation instantanée et légèreté).</text:p>
        </text:list-item>
      </text:list>
      <text:h text:style-name="Heading_20_2" text:outline-level="2">3. LA BASE DE DONNÉES : Points Forts &amp; Particularités</text:h>
      <text:list xml:id="list4035306694" text:style-name="L3">
        <text:list-item>
          <text:p text:style-name="P3"><text:span text:style-name="Strong_20_Emphasis">L'Identifiant UUID :</text:span> "J'ai abandonné les ID classiques (1, 2, 3) pour des UUID. C'est une norme de sécurité haute performance qui empêche de deviner le volume de données et protège l'anonymat des patients dans les URLs."</text:p>
        </text:list-item>
        <text:list-item>
          <text:p text:style-name="P3"><text:span text:style-name="Strong_20_Emphasis">Le Pilier "User" :</text:span> "C'est le pivot central. Grâce au champ json roles, le système identifie instantanément s'il doit afficher le Dashboard de gestion pour Sandrine ou l'Espace d'échanges pour Léa."</text:p>
        </text:list-item>
        <text:list-item>
          <text:p text:style-name="P3"><text:span text:style-name="Strong_20_Emphasis">La Table "Lexicon" (Nouveauté) :</text:span> "C'est l'outil de pédagogie. Elle est liée de manière transversale au Sanctuaire et au Blog. Un service Symfony scanne les textes et transforme les mots complexes en points d'accès (Popovers)."</text:p>
        </text:list-item>
        <text:list-item>
          <text:p text:style-name="P3"><text:span text:style-name="Strong_20_Emphasis">L'Échange Thérapeutique :</text:span> "C'est l'empreinte numérique du patient. On ne perd rien. Chaque message est historisé et possède un status (À traiter, Répondu), garantissant un suivi professionnel."</text:p>
        </text:list-item>
      </text:list>
      <text:h text:style-name="Heading_20_2" text:outline-level="2"><text:soft-page-break/>4. EXPÉRIENCE UTILISATEUR (UX) : Les Détails "Pro"</text:h>
      <text:list xml:id="list2245137490" text:style-name="L4">
        <text:list-item>
          <text:p text:style-name="P4"><text:span text:style-name="Strong_20_Emphasis">Le Popover (vs Toast/Modal) :</text:span> "Pour le lexique, j'ai choisi le <text:span text:style-name="Strong_20_Emphasis">Popover</text:span>. Contrairement à une Modal qui coupe la lecture, le Popover affiche la définition dans une bulle élégante au-dessus du mot. C'est fluide, zen et informatif."</text:p>
        </text:list-item>
        <text:list-item>
          <text:p text:style-name="P4"><text:span text:style-name="Strong_20_Emphasis">La Recherche Prédictive :</text:span> "La barre de recherche présente dans le Lexique et l'Overlay est conçue pour être instantanée grâce à l'indexation SQL de la colonne term. On offre une réponse avant même que l'utilisateur ait fini de taper."</text:p>
        </text:list-item>
        <text:list-item>
          <text:p text:style-name="P4"><text:span text:style-name="Strong_20_Emphasis">Le Paiement Sécurisé :</text:span> "Nous utilisons une table PAYMENT qui sert de passerelle. On ne stocke aucune donnée bancaire (conformité RGPD), seulement l'ID de transaction externe (Stripe). La sécurité est totale."</text:p>
        </text:list-item>
      </text:list>
      <text:h text:style-name="Heading_20_2" text:outline-level="2">5. PARTICULARITÉS À EXPLIQUER À L'ORAL</text:h>
      <text:list xml:id="list1056999548" text:style-name="L5">
        <text:list-item>
          <text:p text:style-name="P5"><text:span text:style-name="Strong_20_Emphasis">Pourquoi un seul Catalogue pour Soins et Forfaits ?</text:span> "Par simplicité et pragmatisme. Le champ type dans la table Treatment suffit à l'interface pour adapter l'affichage. On évite de multiplier les tables inutilement."</text:p>
        </text:list-item>
        <text:list-item>
          <text:p text:style-name="P5"><text:span text:style-name="Strong_20_Emphasis">Pourquoi distinguer Sanctuaire et Blog ?</text:span> "Le Sanctuaire est le Savoir immuable (MTC de 3 000 ans). Le Blog est le Savoir vivant (conseils de saison). Techniquement, c'est la même table, mais filtrée par une category pour une maintenance facilitée."</text:p>
        </text:list-item>
        <text:list-item>
          <text:p text:style-name="P5"><text:span text:style-name="Strong_20_Emphasis">Le bouton de Synchronicité :</text:span> "Sur la frame des échanges, le bouton 'Choisir un instant pour soi' n'est pas qu'un lien vers l'agenda, c'est l'aboutissement du dialogue thérapeutique."</text:p>
        </text:list-item>
      </text:list>
      <text:p text:style-name="Horizontal_20_Line"/>
      <text:h text:style-name="Heading_20_3" text:outline-level="3">💡 CONSEIL POUR L'ORAL :</text:h>
      <text:p text:style-name="Text_20_body">Si on vous demande : <text:span text:style-name="T1">"Pourquoi avoir fait tout ce travail de conception Mermaid avant de coder ?"</text:span><text:line-break/><text:span text:style-name="Strong_20_Emphasis">Réponse :</text:span> <text:span text:style-name="T1">"En Shiatsu Namikoshi, on n'agit pas sans un diagnostic précis de l'énergie. En développement, c'est pareil. Le MCD est mon diagnostic. Il me permet de coder une structure saine, évolutive et sans erreurs logiques."</text:span></text:p>
      <text:p text:style-name="Text_20_body"><text:span text:style-name="Strong_20_Emphasis">Tout est clair pour vous dans cette fiche ?</text:span> Si oui, nous avons terminé la phase de Conception. Nous pouvons maintenant passer à la <text:span text:style-name="Strong_20_Emphasis">Création des Entités dans Symfony</text:span> (User, Treatment, Article, Lexicon, etc.) l'esprit tranquill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15:15:18.230437300</meta:creation-date>
    <dc:date>2026-06-30T15:16:20.243338489</dc:date>
    <meta:editing-duration>PT1M6S</meta:editing-duration>
    <meta:editing-cycles>1</meta:editing-cycles>
    <meta:generator>LibreOffice/7.3.7.2$Linux_X86_64 LibreOffice_project/30$Build-2</meta:generator>
    <meta:document-statistic meta:table-count="0" meta:image-count="0" meta:object-count="0" meta:page-count="2" meta:paragraph-count="27" meta:word-count="621" meta:character-count="3900" meta:non-whitespace-character-count="3323"/>
  </office:meta>
</office:document-meta>
</file>