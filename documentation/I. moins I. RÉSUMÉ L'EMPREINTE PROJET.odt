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2e041"/>
    </style:style>
    <style:style style:name="P2" style:family="paragraph" style:parent-style-name="Heading_20_4">
      <style:text-properties officeooo:paragraph-rsid="0002e041"/>
    </style:style>
    <style:style style:name="P3" style:family="paragraph" style:parent-style-name="Standard">
      <style:text-properties officeooo:paragraph-rsid="0002e041"/>
    </style:style>
    <style:style style:name="P4" style:family="paragraph" style:parent-style-name="Text_20_body" style:list-style-name="L1">
      <style:text-properties officeooo:paragraph-rsid="0002e041"/>
    </style:style>
    <style:style style:name="P5" style:family="paragraph" style:parent-style-name="Text_20_body" style:list-style-name="L5">
      <style:text-properties officeooo:paragraph-rsid="0002e041"/>
    </style:style>
    <style:style style:name="P6" style:family="paragraph" style:parent-style-name="Text_20_body" style:list-style-name="L6">
      <style:text-properties officeooo:paragraph-rsid="0002e041"/>
    </style:style>
    <style:style style:name="P7" style:family="paragraph" style:parent-style-name="Text_20_body" style:list-style-name="L7">
      <style:text-properties officeooo:paragraph-rsid="0002e041"/>
    </style:style>
    <style:style style:name="P8" style:family="paragraph" style:parent-style-name="Text_20_body">
      <style:text-properties officeooo:paragraph-rsid="0002e04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Rédaction du Dossier "L'EMPREINTE" (Phase 1)</text:h>
      <text:p text:style-name="P8"/>
      <text:h text:style-name="P2" text:outline-level="4"><text:span text:style-name="Strong_20_Emphasis">I. Introduction</text:span></text:h>
      <text:p text:style-name="P8">Ce projet consiste en la conception et la réalisation de la plateforme numérique <text:span text:style-name="Strong_20_Emphasis">"L'EMPREINTE"</text:span>, dédiée au cabinet de Shiatsu Traditionnel et de Médecine Traditionnelle Chinoise de Sandrine Tribhou (Toulouse/Tournefeuille).</text:p>
      <text:p text:style-name="P8">Loin d'un simple site vitrine, l'application a été pensée comme un écosystème thérapeutique global. Elle accompagne l'utilisateur dans un parcours de <text:span text:style-name="Strong_20_Emphasis">Synchronicité</text:span>, allant de la découverte pédagogique (Le Sanctuaire) à l'engagement profond (Le Soin). Le projet répond aux standards de la "Haute Couture" numérique : une interface épurée, une sécurité maximale et une architecture logicielle de pointe.</text:p>
      <text:h text:style-name="P2" text:outline-level="4"><text:span text:style-name="Strong_20_Emphasis">II. Objectifs du projet</text:span></text:h>
      <text:p text:style-name="P8">L’enjeu majeur était de traduire la sérénité du cabinet dans une architecture web robuste. Les objectifs clés sont les suivants :</text:p>
      <text:list xml:id="list2180654557" text:style-name="L1">
        <text:list-item>
          <text:p text:style-name="P4"><text:span text:style-name="Strong_20_Emphasis">Structurer une base de données relationnelle complexe</text:span> (PostgreSQL) capable de gérer le cycle complet du patient (échanges, rendez-vous, paiements).</text:p>
        </text:list-item>
        <text:list-item>
          <text:p text:style-name="P4"><text:span text:style-name="Strong_20_Emphasis">Garantir une intégrité totale des données</text:span> par l'utilisation d'identifiants sécurisés (UUID) et une gestion fine des rôles (Admin/Patient).</text:p>
        </text:list-item>
        <text:list-item>
          <text:p text:style-name="P4"><text:span text:style-name="Strong_20_Emphasis">Offrir une expérience utilisateur (UX) fluide et zen</text:span>, minimisant la charge cognitive pour favoriser l'état de relaxation dès la navigation.</text:p>
        </text:list-item>
        <text:list-item>
          <text:p text:style-name="P4"><text:span text:style-name="Strong_20_Emphasis">Intégrer des outils de gestion métier exclusifs</text:span> : un portefeuille numérique (Wallet) et un système de génération de cartes cadeaux (numériques et physiques).</text:p>
        </text:list-item>
        <text:list-item>
          <text:p text:style-name="P4"><text:span text:style-name="Strong_20_Emphasis">Assurer la transmission du savoir</text:span> via un Lexique dynamique relié transversalement aux articles du Sanctuaire.</text:p>
        </text:list-item>
      </text:list>
      <text:h text:style-name="P2" text:outline-level="4" text:is-list-header="true"><text:span text:style-name="Strong_20_Emphasis">III. Technologies utilisées</text:span> (Votre Stack "State of the Art")</text:h>
      <text:list xml:id="list94642413" text:style-name="L5">
        <text:list-item>
          <text:p text:style-name="P5"><text:span text:style-name="Strong_20_Emphasis">Back-end :</text:span> Symfony 8 et PHP 8.4 (dernières versions stables).</text:p>
        </text:list-item>
        <text:list-item>
          <text:p text:style-name="P5"><text:span text:style-name="Strong_20_Emphasis">Base de données :</text:span> PostgreSQL 14 (choix de la robustesse relationnelle).</text:p>
        </text:list-item>
        <text:list-item>
          <text:p text:style-name="P5"><text:span text:style-name="Strong_20_Emphasis">Front-end :</text:span> Tailwind v4 (moteur Rust) pour un rendu visuel ultra-léger et précis.</text:p>
        </text:list-item>
        <text:list-item>
          <text:p text:style-name="P5"><text:span text:style-name="Strong_20_Emphasis">Infrastructure :</text:span> Docker Desktop avec <text:span text:style-name="Strong_20_Emphasis">FrankenPHP</text:span> pour un environnement de développement reproductible et performant.</text:p>
        </text:list-item>
        <text:list-item>
          <text:p text:style-name="P5"><text:span text:style-name="Strong_20_Emphasis">Conception :</text:span> Figma (Maquettage haute fidélité), Mermaid.live (MCD) et Diagrams.net (UML).</text:p>
        </text:list-item>
      </text:list>
      <text:h text:style-name="P1" text:outline-level="3">IV. Rôle des utilisateurs</text:h>
      <text:p text:style-name="P8">Deux profils d’utilisateurs principaux ont été modélisés pour assurer la fluidité de l'écosystème :</text:p>
      <text:list xml:id="list454038701" text:style-name="L6">
        <text:list-item>
          <text:p text:style-name="P6"><text:soft-page-break/><text:span text:style-name="Strong_20_Emphasis">Les Patients (Léa) :</text:span><text:line-break/>Ils accèdent à une expérience personnalisée. Au-delà de la consultation du catalogue et du Sanctuaire (Savoir), ils disposent d'un <text:span text:style-name="Strong_20_Emphasis">Espace Personnel</text:span> sécurisé. Ils peuvent y suivre leurs échanges thérapeutiques, gérer leurs rendez-vous via l'agenda synchronisé, et utiliser leur <text:span text:style-name="Strong_20_Emphasis">Wallet</text:span> (portefeuille numérique) crédité pour régler leurs soins en toute simplicité.</text:p>
        </text:list-item>
        <text:list-item>
          <text:p text:style-name="P6"><text:span text:style-name="Strong_20_Emphasis">L’Administratrice (Sandrine) :</text:span><text:line-break/>Elle dispose d'un <text:span text:style-name="Strong_20_Emphasis">Tableau de Bord de pilotage</text:span>. Ses droits étendus lui permettent de gérer l'intégralité du catalogue de soins, de rédiger les articles de MTC, d'enrichir le lexique et de répondre aux sollicitations des patients. Elle possède également le privilège exclusif de <text:span text:style-name="Strong_20_Emphasis">générer des cartes cadeaux hachées</text:span> et de créditer les Wallets des bénéficiaires.</text:p>
        </text:list-item>
      </text:list>
      <text:h text:style-name="P1" text:outline-level="3" text:is-list-header="true">V. Détails de la Stack Technique</text:h>
      <text:p text:style-name="P8">Le projet repose sur les versions les plus avancées des technologies de développement web pour garantir performance et sécurité :</text:p>
      <text:list xml:id="list3693948320" text:style-name="L7">
        <text:list-item>
          <text:p text:style-name="P7"><text:span text:style-name="Strong_20_Emphasis">Back-end : Framework Symfony 8 &amp; PHP 8.4</text:span><text:line-break/>L'utilisation de la toute dernière version de PHP permet de bénéficier du moteur JIT pour une rapidité d'exécution optimale. Symfony assure une structure modulaire et robuste.</text:p>
        </text:list-item>
        <text:list-item>
          <text:p text:style-name="P7"><text:span text:style-name="Strong_20_Emphasis">Base de données : PostgreSQL 14</text:span><text:line-break/>Choix de la précision et de la fiabilité pour la gestion des relations complexes (MCD) et des données monétaires (Decimal).</text:p>
        </text:list-item>
        <text:list-item>
          <text:p text:style-name="P7"><text:span text:style-name="Strong_20_Emphasis">Front-end : Tailwind CSS v4 &amp; Twig</text:span><text:line-break/>L'intégration du nouveau moteur de compilation Rust de Tailwind v4 permet une interface "poids plume" et un design "Zen" parfaitement fluide.</text:p>
        </text:list-item>
        <text:list-item>
          <text:p text:style-name="P7"><text:span text:style-name="Strong_20_Emphasis">Déploiement &amp; Environnement : Docker &amp; FrankenPHP</text:span><text:line-break/>L'utilisation de <text:span text:style-name="Strong_20_Emphasis">FrankenPHP</text:span> (serveur d'application écrit en Go) permet une montée en charge fluide et un environnement de développement strictement identique à la production.</text:p>
        </text:list-item>
        <text:list-item>
          <text:p text:style-name="P7"><text:span text:style-name="Strong_20_Emphasis">Sécurité :</text:span><text:line-break/>Hashage des mots de passe, protection contre les failles CSRF native à Symfony, et utilisation d'identifiants <text:span text:style-name="Strong_20_Emphasis">UUID</text:span> pour l'anonymisation des données sensibles.</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09:36:09.571086662</meta:creation-date>
    <meta:generator>LibreOffice/7.3.7.2$Linux_X86_64 LibreOffice_project/30$Build-2</meta:generator>
    <dc:date>2026-07-07T09:43:04.408252787</dc:date>
    <meta:editing-duration>PT6M56S</meta:editing-duration>
    <meta:editing-cycles>1</meta:editing-cycles>
    <meta:document-statistic meta:table-count="0" meta:image-count="0" meta:object-count="0" meta:page-count="2" meta:paragraph-count="28" meta:word-count="597" meta:character-count="4013" meta:non-whitespace-character-count="3461"/>
  </office:meta>
</office:document-meta>
</file>