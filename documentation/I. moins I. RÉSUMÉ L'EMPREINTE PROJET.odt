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morant Garamond" svg:font-family="'Cormorant Garamond'" style:font-pitch="variable"/>
    <style:font-face style:name="Cormorant Garamond1" svg:font-family="'Cormorant Garamond'" style:font-adornments="Gras" style:font-pitch="variable"/>
    <style:font-face style:name="Cormorant Garamond2" svg:font-family="'Cormorant Garamond'" style:font-adornments="Italique gras" style:font-pitch="variable"/>
    <style:font-face style:name="EB Garamond" svg:font-family="'EB Garamon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officeooo:paragraph-rsid="0002e041"/>
    </style:style>
    <style:style style:name="P2" style:family="paragraph" style:parent-style-name="Text_20_body">
      <style:paragraph-properties fo:line-height="115%" fo:text-align="justify" style:justify-single-word="false"/>
      <style:text-properties officeooo:paragraph-rsid="0002e041"/>
    </style:style>
    <style:style style:name="P3" style:family="paragraph" style:parent-style-name="Standard">
      <style:paragraph-properties fo:line-height="115%"/>
      <style:text-properties style:font-name="EB Garamond" officeooo:paragraph-rsid="0002e041"/>
    </style:style>
    <style:style style:name="P4" style:family="paragraph" style:parent-style-name="Text_20_body">
      <style:paragraph-properties fo:line-height="115%"/>
      <style:text-properties style:font-name="EB Garamond" officeooo:paragraph-rsid="0002e041"/>
    </style:style>
    <style:style style:name="P5" style:family="paragraph" style:parent-style-name="Text_20_body">
      <style:paragraph-properties fo:line-height="115%"/>
      <style:text-properties style:font-name="Cormorant Garamond" fo:font-style="italic" officeooo:paragraph-rsid="0002e041" style:font-style-asian="italic" style:font-style-complex="italic"/>
    </style:style>
    <style:style style:name="P6" style:family="paragraph" style:parent-style-name="Heading_20_3">
      <style:paragraph-properties fo:line-height="115%"/>
      <style:text-properties style:font-name="Cormorant Garamond" fo:font-size="14pt" fo:font-style="italic" officeooo:paragraph-rsid="0002e041" style:font-size-asian="14pt" style:font-style-asian="italic" style:font-size-complex="14pt" style:font-style-complex="italic"/>
    </style:style>
    <style:style style:name="P7" style:family="paragraph" style:parent-style-name="Heading_20_3">
      <style:paragraph-properties fo:line-height="115%"/>
      <style:text-properties style:font-name="Cormorant Garamond" fo:font-size="32pt" fo:font-style="italic" officeooo:paragraph-rsid="0002e041" style:font-size-asian="32pt" style:font-style-asian="italic" style:font-size-complex="32pt" style:font-style-complex="italic"/>
    </style:style>
    <style:style style:name="P8" style:family="paragraph" style:parent-style-name="Heading_20_3">
      <style:paragraph-properties fo:line-height="115%"/>
      <style:text-properties style:font-name="Cormorant Garamond" fo:font-size="24pt" fo:font-style="italic" officeooo:paragraph-rsid="0002e041" style:font-size-asian="24pt" style:font-style-asian="italic" style:font-size-complex="24pt" style:font-style-complex="italic"/>
    </style:style>
    <style:style style:name="P9" style:family="paragraph" style:parent-style-name="Heading_20_4">
      <style:paragraph-properties fo:line-height="115%"/>
      <style:text-properties officeooo:paragraph-rsid="0002e041"/>
    </style:style>
    <style:style style:name="P10" style:family="paragraph" style:parent-style-name="Text_20_body" style:list-style-name="L1">
      <style:paragraph-properties fo:line-height="115%"/>
      <style:text-properties officeooo:paragraph-rsid="0002e041"/>
    </style:style>
    <style:style style:name="P11" style:family="paragraph" style:parent-style-name="Text_20_body" style:list-style-name="L2">
      <style:paragraph-properties fo:line-height="115%"/>
      <style:text-properties officeooo:paragraph-rsid="0002e041"/>
    </style:style>
    <style:style style:name="P12" style:family="paragraph" style:parent-style-name="Text_20_body" style:list-style-name="L3">
      <style:paragraph-properties fo:line-height="115%"/>
      <style:text-properties officeooo:paragraph-rsid="0002e041"/>
    </style:style>
    <style:style style:name="P13" style:family="paragraph" style:parent-style-name="Text_20_body" style:list-style-name="L4">
      <style:paragraph-properties fo:line-height="115%"/>
      <style:text-properties officeooo:paragraph-rsid="0002e041"/>
    </style:style>
    <style:style style:name="P14" style:family="paragraph" style:parent-style-name="Text_20_body" style:list-style-name="L4">
      <style:paragraph-properties fo:line-height="115%"/>
      <style:text-properties officeooo:paragraph-rsid="00079c13"/>
    </style:style>
    <style:style style:name="P15" style:family="paragraph" style:parent-style-name="Text_20_body">
      <style:paragraph-properties fo:line-height="115%"/>
      <style:text-properties style:font-name="Cormorant Garamond" fo:font-size="14pt" fo:font-style="italic" officeooo:paragraph-rsid="0002e041" style:font-size-asian="14pt" style:font-style-asian="italic" style:font-size-complex="14pt" style:font-style-complex="italic"/>
    </style:style>
    <style:style style:name="T1" style:family="text">
      <style:text-properties style:font-name="EB Garamond"/>
    </style:style>
    <style:style style:name="T2" style:family="text">
      <style:text-properties style:font-name="Cormorant Garamond" fo:font-style="italic" style:font-style-asian="italic" style:font-style-complex="italic"/>
    </style:style>
    <style:style style:name="T3" style:family="text">
      <style:text-properties style:font-name="Cormorant Garamond" fo:font-size="14pt" fo:font-style="italic" style:font-size-asian="14pt" style:font-style-asian="italic" style:font-size-complex="14pt" style:font-style-complex="italic"/>
    </style:style>
    <style:style style:name="T4" style:family="text">
      <style:text-properties style:font-name="Cormorant Garamond" fo:font-size="24pt" fo:font-style="italic" style:font-size-asian="24pt" style:font-style-asian="italic" style:font-size-complex="24pt"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Rédaction du Dossier "L'EMPREINTE" (Phase 1)</text:h>
      <text:p text:style-name="P5"/>
      <text:h text:style-name="P9" text:outline-level="4"><text:span text:style-name="Strong_20_Emphasis"><text:span text:style-name="T4">I. Introduction</text:span></text:span></text:h>
      <text:p text:style-name="P1"><text:span text:style-name="Strong_20_Emphasis"/></text:p>
      <text:p text:style-name="P2"><text:span text:style-name="T1"><text:s text:c="4"/>Ce projet consiste en la conception et la réalisation de la plateforme numérique </text:span><text:span text:style-name="Strong_20_Emphasis"><text:span text:style-name="T1">"L'EMPREINTE"</text:span></text:span><text:span text:style-name="T1">, dédiée au cabinet de Shiatsu Traditionnel et de Médecine Traditionnelle Chinoise de Sandrine Tribhou (Toulouse/Tournefeuille).</text:span></text:p>
      <text:p text:style-name="P2"><text:span text:style-name="T1"><text:s text:c="4"/>Loin d'un simple site vitrine, l'application a été pensée comme un écosystème thérapeutique global. Elle accompagne l'utilisateur dans un parcours de </text:span><text:span text:style-name="Strong_20_Emphasis"><text:span text:style-name="T1">Synchronicité</text:span></text:span><text:span text:style-name="T1">, allant de la découverte pédagogique (Le Sanctuaire) à l'engagement profond (Le Soin). Le projet répond aux standards de la "Haute Couture" numérique : une interface épurée, une sécurité maximale et une architecture logicielle de pointe.</text:span></text:p>
      <text:p text:style-name="P2"/>
      <text:h text:style-name="P9" text:outline-level="4"><text:span text:style-name="Strong_20_Emphasis"><text:span text:style-name="T4">II. Objectifs du projet</text:span></text:span></text:h>
      <text:p text:style-name="P1"><text:span text:style-name="Strong_20_Emphasis"><text:span text:style-name="T2"/></text:span></text:p>
      <text:p text:style-name="P1"><text:s text:c="4"/><text:span text:style-name="T1">L’enjeu majeur était de traduire la sérénité du cabinet dans une architecture web robuste. Les objectifs clés sont les suivants :</text:span></text:p>
      <text:p text:style-name="P4"/>
      <text:p text:style-name="P4"/>
      <text:list xml:id="list3030820518" text:style-name="L1">
        <text:list-item>
          <text:p text:style-name="P10"><text:span text:style-name="Strong_20_Emphasis"><text:span text:style-name="T1">Structurer une base de données relationnelle complexe</text:span></text:span><text:span text:style-name="T1"> (PostgreSQL) capable de gérer le cycle complet du patient (échanges, rendez-vous, paiements).</text:span></text:p>
        </text:list-item>
        <text:list-item>
          <text:p text:style-name="P10"><text:span text:style-name="Strong_20_Emphasis"><text:span text:style-name="T1">Garantir une intégrité totale des données</text:span></text:span><text:span text:style-name="T1"> par l'utilisation d'identifiants sécurisés (UUID) et une gestion fine des rôles (Admin/Patient).</text:span></text:p>
        </text:list-item>
        <text:list-item>
          <text:p text:style-name="P10"><text:span text:style-name="Strong_20_Emphasis"><text:span text:style-name="T1">Offrir une expérience utilisateur (UX) fluide et zen</text:span></text:span><text:span text:style-name="T1">, minimisant la charge cognitive pour favoriser l'état de relaxation dès la navigation.</text:span></text:p>
        </text:list-item>
        <text:list-item>
          <text:p text:style-name="P10"><text:span text:style-name="Strong_20_Emphasis"><text:span text:style-name="T1">Intégrer des outils de gestion métier exclusifs</text:span></text:span><text:span text:style-name="T1"> : un portefeuille numérique (Wallet) et un système de génération de cartes cadeaux (numériques et physiques).</text:span></text:p>
        </text:list-item>
        <text:list-item>
          <text:p text:style-name="P10"><text:span text:style-name="Strong_20_Emphasis"><text:span text:style-name="T1">Assurer la transmission du savoir</text:span></text:span><text:span text:style-name="T1"> via un Lexique dynamique relié transversalement aux articles du Sanctuaire.</text:span></text:p>
        </text:list-item>
      </text:list>
      <text:p text:style-name="P1"><text:soft-page-break/></text:p>
      <text:p text:style-name="P1"/>
      <text:h text:style-name="P9" text:outline-level="4" text:is-list-header="true"><text:span text:style-name="Strong_20_Emphasis"><text:span text:style-name="T4">III. Technologies utilisées</text:span></text:span><text:span text:style-name="T4"> (Votre Stack "State of the Art")</text:span></text:h>
      <text:p text:style-name="P15"/>
      <text:p text:style-name="P1"/>
      <text:list xml:id="list2542242253" text:style-name="L2">
        <text:list-item>
          <text:p text:style-name="P11"><text:span text:style-name="Strong_20_Emphasis"><text:span text:style-name="T1">Back-end :</text:span></text:span><text:span text:style-name="T1"> Symfony 8 et PHP 8.4 (dernières versions stables).</text:span></text:p>
        </text:list-item>
        <text:list-item>
          <text:p text:style-name="P11"><text:span text:style-name="Strong_20_Emphasis"><text:span text:style-name="T1">Base de données :</text:span></text:span><text:span text:style-name="T1"> PostgreSQL 14 (choix de la robustesse relationnelle).</text:span></text:p>
        </text:list-item>
        <text:list-item>
          <text:p text:style-name="P11"><text:span text:style-name="Strong_20_Emphasis"><text:span text:style-name="T1">Front-end :</text:span></text:span><text:span text:style-name="T1"> Tailwind v4 (moteur Rust) pour un rendu visuel ultra-léger et précis.</text:span></text:p>
        </text:list-item>
        <text:list-item>
          <text:p text:style-name="P11"><text:span text:style-name="Strong_20_Emphasis"><text:span text:style-name="T1">Infrastructure :</text:span></text:span><text:span text:style-name="T1"> Docker Desktop avec </text:span><text:span text:style-name="Strong_20_Emphasis"><text:span text:style-name="T1">FrankenPHP</text:span></text:span><text:span text:style-name="T1"> pour un environnement de développement reproductible et performant.</text:span></text:p>
        </text:list-item>
        <text:list-item>
          <text:p text:style-name="P11"><text:span text:style-name="Strong_20_Emphasis"><text:span text:style-name="T1">Conception :</text:span></text:span><text:span text:style-name="T1"> Figma (Maquettage haute fidélité), Mermaid.live (MCD) et Diagrams.net (UML).</text:span></text:p>
          <text:p text:style-name="P11"/>
          <text:p text:style-name="P11"/>
        </text:list-item>
      </text:list>
      <text:h text:style-name="P6" text:outline-level="3">IV. Rôle des utilisateurs</text:h>
      <text:p text:style-name="P1"/>
      <text:p text:style-name="P1"><text:s text:c="4"/><text:span text:style-name="T1">Deux profils d’utilisateurs principaux ont été modélisés pour assurer la fluidité de l'écosystème :</text:span></text:p>
      <text:p text:style-name="P4"/>
      <text:p text:style-name="P4"/>
      <text:list xml:id="list1267568705" text:style-name="L3">
        <text:list-item>
          <text:p text:style-name="P12"><text:span text:style-name="Strong_20_Emphasis"><text:span text:style-name="T1">Les Patients (Léa) :</text:span></text:span><text:span text:style-name="T1"><text:line-break/>Ils accèdent à une expérience personnalisée. Au-delà de la consultation du catalogue et du Sanctuaire (Savoir), ils disposent d'un </text:span><text:span text:style-name="Strong_20_Emphasis"><text:span text:style-name="T1">Espace Personnel</text:span></text:span><text:span text:style-name="T1"> sécurisé. Ils peuvent y suivre leurs échanges thérapeutiques, gérer leurs rendez-vous via l'agenda synchronisé, et utiliser leur </text:span><text:span text:style-name="Strong_20_Emphasis"><text:span text:style-name="T1">Wallet</text:span></text:span><text:span text:style-name="T1"> (portefeuille numérique) crédité pour régler leurs soins en toute simplicité.</text:span></text:p>
        </text:list-item>
        <text:list-item>
          <text:p text:style-name="P12"><text:span text:style-name="Strong_20_Emphasis"><text:span text:style-name="T1">L’Administratrice (Sandrine) :</text:span></text:span><text:span text:style-name="T1"><text:line-break/>Elle dispose d'un </text:span><text:span text:style-name="Strong_20_Emphasis"><text:span text:style-name="T1">Tableau de Bord de pilotage</text:span></text:span><text:span text:style-name="T1">. Ses droits étendus lui permettent de gérer l'intégralité du catalogue de soins, de rédiger les articles de MTC, d'enrichir le lexique et de répondre aux sollicitations des patients. Elle possède également le privilège exclusif de </text:span><text:span text:style-name="Strong_20_Emphasis"><text:span text:style-name="T1">générer des cartes cadeaux hachées</text:span></text:span><text:span text:style-name="T1"> et de créditer les Wallets des bénéficiaires.</text:span></text:p>
        </text:list-item>
      </text:list>
      <text:p text:style-name="P1"/>
      <text:p text:style-name="P1"/>
      <text:h text:style-name="P8" text:outline-level="3" text:is-list-header="true"><text:soft-page-break/>V. Détails de la Stack Technique</text:h>
      <text:p text:style-name="P1"/>
      <text:p text:style-name="P1"><text:s text:c="3"/><text:span text:style-name="T1"><text:s/>Le projet repose sur les versions les plus avancées des technologies de développement web pour garantir performance et sécurité :</text:span></text:p>
      <text:p text:style-name="P1"/>
      <text:p text:style-name="P4"/>
      <text:list xml:id="list3467058292" text:style-name="L4">
        <text:list-item>
          <text:p text:style-name="P13"><text:span text:style-name="Strong_20_Emphasis"><text:span text:style-name="T1">Back-end : Framework Symfony 8 &amp; PHP 8.4</text:span></text:span><text:span text:style-name="T1"><text:line-break/>L'utilisation de la toute dernière version de PHP permet de bénéficier du moteur JIT pour une rapidité d'exécution optimale. Symfony assure une structure modulaire et robuste.</text:span></text:p>
        </text:list-item>
        <text:list-item>
          <text:p text:style-name="P13"><text:span text:style-name="Strong_20_Emphasis"><text:span text:style-name="T1">Base de données : PostgreSQL 14</text:span></text:span><text:span text:style-name="T1"><text:line-break/>Choix de la précision et de la fiabilité pour la gestion des relations complexes (MCD) et des données monétaires (Decimal).</text:span></text:p>
        </text:list-item>
        <text:list-item>
          <text:p text:style-name="P13"><text:span text:style-name="Strong_20_Emphasis"><text:span text:style-name="T1">Front-end : Tailwind CSS v4 &amp; Twig</text:span></text:span><text:span text:style-name="T1"><text:line-break/>L'intégration du nouveau moteur de compilation Rust de Tailwind v4 permet une interface "poids plume" et un design "Zen" parfaitement fluide.</text:span></text:p>
        </text:list-item>
        <text:list-item>
          <text:p text:style-name="P13"><text:span text:style-name="Strong_20_Emphasis"><text:span text:style-name="T1">Déploiement &amp; Environnement : Docker &amp; FrankenPHP</text:span></text:span><text:span text:style-name="T1"><text:line-break/>L'utilisation de </text:span><text:span text:style-name="Strong_20_Emphasis"><text:span text:style-name="T1">FrankenPHP</text:span></text:span><text:span text:style-name="T1"> (serveur d'application écrit en Go) permet une montée en charge fluide et un environnement de développement strictement identique à la production.</text:span></text:p>
        </text:list-item>
        <text:list-item>
          <text:p text:style-name="P14"><text:span text:style-name="Strong_20_Emphasis"><text:span text:style-name="T1">Sécurité : </text:span></text:span><text:span text:style-name="T1">Hashage des mots de passe, protection contre les failles CSRF native à Symfony, et utilisation d'identifiants </text:span><text:span text:style-name="Strong_20_Emphasis"><text:span text:style-name="T1">UUID</text:span></text:span><text:span text:style-name="T1"> pour l'anonymisation des données sensibles.</text:span></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morant Garamond" svg:font-family="'Cormorant Garamond'" style:font-pitch="variable"/>
    <style:font-face style:name="Cormorant Garamond1" svg:font-family="'Cormorant Garamond'" style:font-adornments="Gras" style:font-pitch="variable"/>
    <style:font-face style:name="Cormorant Garamond2" svg:font-family="'Cormorant Garamond'" style:font-adornments="Italique gras" style:font-pitch="variable"/>
    <style:font-face style:name="EB Garamond" svg:font-family="'EB Garamon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hyphenation-ladder-count="no-limit" style:page-number="auto"/>
      <style:text-properties style:font-name="Cormorant Garamond2" fo:font-family="'Cormorant Garamond'" style:font-style-name="Italique gras" style:font-pitch="variable" fo:font-size="18pt" fo:font-style="italic"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8a9a5b" loext:opacity="100%" style:font-name="Cormorant Garamond1" fo:font-family="'Cormorant Garamond'" style:font-style-name="Gras" style:font-pitch="variable" fo:font-size="3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8a9a5b" loext:opacity="100%" style:font-name="Cormorant Garamond1" fo:font-family="'Cormorant Garamond'" style:font-style-name="Gras" style:font-pitch="variable" fo:font-size="24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7-07T09:36:09.571086662</meta:creation-date>
    <meta:generator>LibreOffice/7.3.7.2$Linux_X86_64 LibreOffice_project/30$Build-2</meta:generator>
    <dc:date>2026-07-10T15:05:57.434284477</dc:date>
    <meta:editing-duration>PT38M15S</meta:editing-duration>
    <meta:editing-cycles>7</meta:editing-cycles>
    <meta:document-statistic meta:table-count="0" meta:image-count="0" meta:object-count="0" meta:page-count="3" meta:paragraph-count="30" meta:word-count="599" meta:character-count="4035" meta:non-whitespace-character-count="3463"/>
  </office:meta>
</office:document-meta>
</file>