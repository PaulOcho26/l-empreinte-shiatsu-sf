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B4000000224488A7BCC3E30784.jpg" manifest:media-type="image/jpeg"/>
  <manifest:file-entry manifest:full-path="Pictures/10000000000000BD000000254169F9F72411C7B0.jpg" manifest:media-type="image/jpeg"/>
  <manifest:file-entry manifest:full-path="Pictures/100000000000018900000045B4DE267F4748436E.jpg" manifest:media-type="image/jpeg"/>
  <manifest:file-entry manifest:full-path="Pictures/100000000000018900000A3912333E94A886D9C3.jpg" manifest:media-type="image/jpeg"/>
  <manifest:file-entry manifest:full-path="Pictures/1000000000000189000008FE524A4443A13A948E.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rmorant Garamond" svg:font-family="'Cormorant Garamond'" style:font-adornments="Italique" style:font-pitch="variable"/>
    <style:font-face style:name="Cormorant Garamond1" svg:font-family="'Cormorant Garamond'" style:font-adornments="Italique gras" style:font-pitch="variable"/>
    <style:font-face style:name="Cormorant Garamond2" svg:font-family="'Cormorant Garamond'" style:font-adornments="Normal" style:font-pitch="variable"/>
    <style:font-face style:name="EB Garamond" svg:font-family="'EB Garamond'" style:font-adornments="Norma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fo:margin-left="0cm" fo:margin-right="0cm" fo:margin-top="0cm" fo:margin-bottom="0cm" table:align="margins" fo:background-color="transparent">
        <style:background-image/>
      </style:table-properties>
    </style:style>
    <style:style style:name="Tableau1.A" style:family="table-column">
      <style:table-column-properties style:column-width="8.5cm" style:rel-column-width="4819*"/>
    </style:style>
    <style:style style:name="Tableau1.1" style:family="table-row">
      <style:table-row-properties fo:background-color="transparent">
        <style:background-image/>
      </style:table-row-properties>
    </style:style>
    <style:style style:name="Tableau1.A1" style:family="table-cell">
      <style:table-cell-properties fo:padding-left="0.049cm" fo:padding-right="0.049cm" fo:padding-top="0.049cm" fo:padding-bottom="0.199cm" fo:border="none" style:writing-mode="page"/>
    </style:style>
    <style:style style:name="Tableau2" style:family="table">
      <style:table-properties style:width="17.092cm" fo:margin-left="0cm" table:align="left"/>
    </style:style>
    <style:style style:name="Tableau2.A" style:family="table-column">
      <style:table-column-properties style:column-width="17.092cm"/>
    </style:style>
    <style:style style:name="Tableau2.A1" style:family="table-cell">
      <style:table-cell-properties fo:background-color="#f7f1e8" fo:padding="0cm" fo:border="none" style:writing-mode="page">
        <style:background-image/>
      </style:table-cell-properties>
    </style:style>
    <style:style style:name="P1" style:family="paragraph" style:parent-style-name="Text_20_body">
      <style:paragraph-properties fo:margin-left="1cm" fo:margin-right="1cm" fo:text-indent="0cm" style:auto-text-indent="false"/>
    </style:style>
    <style:style style:name="P2" style:family="paragraph" style:parent-style-name="Standard">
      <style:paragraph-properties fo:text-align="justify" style:justify-single-word="false"/>
      <style:text-properties officeooo:paragraph-rsid="0018464d"/>
    </style:style>
    <style:style style:name="P3" style:family="paragraph" style:parent-style-name="Standard">
      <style:text-properties officeooo:rsid="00143145" officeooo:paragraph-rsid="0018464d"/>
    </style:style>
    <style:style style:name="P4" style:family="paragraph" style:parent-style-name="Standard">
      <style:text-properties fo:font-style="italic" officeooo:paragraph-rsid="0018464d"/>
    </style:style>
    <style:style style:name="P5" style:family="paragraph" style:parent-style-name="Table_20_Contents">
      <style:text-properties fo:font-style="italic" officeooo:paragraph-rsid="00167819"/>
    </style:style>
    <style:style style:name="P6" style:family="paragraph" style:parent-style-name="Standard">
      <style:text-properties officeooo:paragraph-rsid="0018464d"/>
    </style:style>
    <style:style style:name="P7" style:family="paragraph" style:parent-style-name="Table_20_Contents">
      <loext:graphic-properties draw:fill="none"/>
      <style:paragraph-properties fo:margin-left="-0.3cm" fo:margin-right="0cm" fo:orphans="0" fo:widows="0" fo:text-indent="-0.499cm" style:auto-text-indent="false" fo:background-color="transparent" text:number-lines="false" text:line-number="0"/>
      <style:text-properties officeooo:paragraph-rsid="00167819"/>
    </style:style>
    <style:style style:name="P8" style:family="paragraph" style:parent-style-name="Table_20_Contents">
      <style:paragraph-properties fo:text-align="center" style:justify-single-word="false"/>
      <style:text-properties officeooo:paragraph-rsid="0018464d"/>
    </style:style>
    <style:style style:name="P9" style:family="paragraph" style:parent-style-name="Text_20_body">
      <style:text-properties officeooo:paragraph-rsid="001a0e6c"/>
    </style:style>
    <style:style style:name="P10" style:family="paragraph" style:parent-style-name="Table_20_Contents">
      <loext:graphic-properties draw:fill-gradient-name="gradient" draw:fill-hatch-name="hatch"/>
      <style:paragraph-properties fo:margin-top="0cm" fo:margin-bottom="0cm" style:contextual-spacing="false" fo:text-align="center" style:justify-single-word="false"/>
      <style:text-properties fo:font-style="italic" officeooo:paragraph-rsid="001d4b85"/>
    </style:style>
    <style:style style:name="P11" style:family="paragraph" style:parent-style-name="Table_20_Contents">
      <loext:graphic-properties draw:fill="none"/>
      <style:paragraph-properties fo:margin-left="2.9cm" fo:margin-right="0.4cm" fo:orphans="0" fo:widows="0" fo:text-indent="0cm" style:auto-text-indent="false" fo:background-color="transparent" text:number-lines="false" text:line-number="0"/>
      <style:text-properties officeooo:paragraph-rsid="00167819"/>
    </style:style>
    <style:style style:name="P12" style:family="paragraph" style:parent-style-name="Standard">
      <style:text-properties fo:font-style="italic" officeooo:paragraph-rsid="0018464d"/>
    </style:style>
    <style:style style:name="P13" style:family="paragraph" style:parent-style-name="Heading_20_1">
      <style:paragraph-properties fo:text-align="start" style:justify-single-word="false"/>
    </style:style>
    <style:style style:name="P14" style:family="paragraph" style:parent-style-name="Heading_20_2">
      <style:text-properties officeooo:paragraph-rsid="001af4be"/>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text-properties officeooo:paragraph-rsid="001af4be"/>
    </style:style>
    <style:style style:name="P20" style:family="paragraph" style:parent-style-name="Text_20_body">
      <style:text-properties officeooo:paragraph-rsid="001a0e6c"/>
    </style:style>
    <style:style style:name="P21" style:family="paragraph" style:parent-style-name="Text_20_body">
      <style:text-properties fo:font-style="italic" officeooo:paragraph-rsid="001d4b85"/>
    </style:style>
    <style:style style:name="T1" style:family="text">
      <style:text-properties fo:font-style="italic"/>
    </style:style>
    <style:style style:name="T2" style:family="text">
      <style:text-properties fo:font-style="italic" officeooo:rsid="00085d70"/>
    </style:style>
    <style:style style:name="T3" style:family="text">
      <style:text-properties officeooo:rsid="00085d70"/>
    </style:style>
    <style:style style:name="T4" style:family="text">
      <style:text-properties fo:font-weight="bold" style:font-weight-asian="bold" style:font-weight-complex="bold"/>
    </style:style>
    <style:style style:name="T5" style:family="text">
      <style:text-properties fo:color="#333333" loext:opacity="100%" fo:font-size="12pt" style:font-size-asian="12pt" style:font-size-complex="12pt"/>
    </style:style>
    <style:style style:name="T6" style:family="text">
      <style:text-properties fo:font-size="18pt" style:font-size-asian="18pt" style:font-size-complex="18pt"/>
    </style:style>
    <style:style style:name="T7" style:family="text">
      <style:text-properties fo:font-weight="normal" style:font-weight-asian="normal" style:font-weight-complex="normal"/>
    </style:style>
    <style:style style:name="T8" style:family="text">
      <style:text-properties fo:font-weight="normal" officeooo:rsid="00085d70" style:font-weight-asian="normal" style:font-weight-complex="normal"/>
    </style:style>
    <style:style style:name="T9" style:family="text"/>
    <style:style style:name="fr1" style:family="graphic" style:parent-style-name="Graphics">
      <style:graphic-properties style:run-through="foreground" style:wrap="dynamic" style:number-wrapped-paragraphs="no-limit" style:wrap-contour="fals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PARTIE IV : CONCEPTION VISUELLE &amp; EXPÉRIENCE UTILISATEUR (UI/UX)</text:h>
      <text:p text:style-name="Standard"/>
      <text:p text:style-name="Standard"/>
      <text:h text:style-name="Heading_20_2" text:outline-level="2">1. <text:span text:style-name="Titre_5f_Vert">Philosophie du Design : "Le Souffle et la Précision"</text:span></text:h>
      <text:p text:style-name="Text_20_body">Pour refléter l'essence du Shiatsu et de la MTC, le design de <text:span text:style-name="Strong_20_Emphasis">L'EMPREINTE</text:span> repose sur le concept de "Zen haut de gamme". L'accent est mis sur le <text:span text:style-name="Strong_20_Emphasis">vide (le souffle)</text:span> : les espaces blancs ne sont pas des manques, mais des respirations nécessaires à la clarté mentale du visiteur. L'interface est épurée pour minimiser la charge cognitive.</text:p>
      <text:h text:style-name="Heading_20_2" text:outline-level="2">2. <text:span text:style-name="Titre_5f_Vert">Identité Graphique (La Charte)</text:span></text:h>
      <text:h text:style-name="Heading_20_3" text:outline-level="3">2.1 <text:span text:style-name="Titre_5f_Vert">Palette de couleurs "Organique"</text:span></text:h>
      <text:p text:style-name="Text_20_body">J'ai sélectionné des teintes naturelles évoquant les éléments de la MTC :</text:p>
      <text:list xml:id="list4040725623" text:style-name="L1">
        <text:list-item>
          <text:p text:style-name="P15"><text:span text:style-name="Strong_20_Emphasis">Zen-Sand (#F7F1E8) :</text:span> Un beige chaud pour le fond, apportant douceur et confort visuel.</text:p>
        </text:list-item>
        <text:list-item>
          <text:p text:style-name="P15"><text:span text:style-name="Strong_20_Emphasis">Zen-Forest (#8A9A5B) :</text:span> Un vert sauge pour les boutons et les accents, symbolisant la vitalité et l'équilibre.</text:p>
        </text:list-item>
        <text:list-item>
          <text:p text:style-name="P15"><text:span text:style-name="Strong_20_Emphasis">Zen-Ink (#2D2926) :</text:span> Un noir "encre de chine" pour les textes, assurant une lisibilité élégante et profonde.</text:p>
        </text:list-item>
      </text:list>
      <text:h text:style-name="Heading_20_3" text:outline-level="3"><text:soft-page-break/>2.2 <text:span text:style-name="Titre_5f_Vert">Typographie "Haute Couture"</text:span></text:h>
      <text:list xml:id="list4094996973" text:style-name="L2">
        <text:list-item>
          <text:p text:style-name="P16"><text:span text:style-name="Strong_20_Emphasis">Cormorant Garamond :</text:span> Utilisée pour les titres (H1/H2) en italique. Sa finesse évoque la tradition et l'élégance.</text:p>
        </text:list-item>
        <text:list-item>
          <text:p text:style-name="P16"><text:span text:style-name="Strong_20_Emphasis">Montserrat / Inter :</text:span> Utilisée pour les textes techniques et les boutons. Sa modernité assure une parfaite lisibilité sur tous les supports.</text:p>
        </text:list-item>
      </text:list>
      <text:h text:style-name="P14" text:outline-level="2">3. <text:span text:style-name="Titre_5f_Vert">Maquettage et Prototypage (Figma)</text:span></text:h>
      <text:p text:style-name="P19"><text:span text:style-name="Titre_5f_Vert"/></text:p>
      <text:p text:style-name="Text_20_body">La phase de conception visuelle a été réalisée sur <text:span text:style-name="Strong_20_Emphasis">Figma</text:span>. J’ai développé un prototype de <text:span text:style-name="Strong_20_Emphasis">21 Frames</text:span> couvrant l’intégralité du parcours utilisateur.</text:p>
      <text:h text:style-name="Heading_20_3" text:outline-level="3">3.1 <text:span text:style-name="Titre_5f_Vert">Approche "Mobile First"</text:span></text:h>
      <text:p text:style-name="Text_20_body">Conformément aux usages actuels (70% du trafic en bien-être s'effectuant sur smartphone), j'ai d'abord finalisé l'intégralité des maquettes en version mobile. Cette contrainte a permis de prioriser l'essentiel : la clarté de l'information et la rapidité de la prise de rendez-vous.</text:p>
      <text:h text:style-name="Heading_20_3" text:outline-level="3">3.2 <text:span text:style-name="Titre_5f_Vert">Navigation : L'Overlay Zen</text:span></text:h>
      <text:p text:style-name="Text_20_body">Au lieu d'un menu classique qui surcharge l'écran, j'ai opté pour un <text:span text:style-name="Strong_20_Emphasis">Overlay plein écran</text:span>. Cette interface de navigation utilise un interlignage large (160%) et une barre de recherche intégrée, permettant au visiteur de trouver un soin ou un terme de lexique sans quitter son état de calme.</text:p>
      <text:p text:style-name="Horizontal_20_Line"/>
      <text:h text:style-name="Heading_20_3" text:outline-level="3">💡 Le conseil "Pro" pour votre oral :</text:h>
      <text:p text:style-name="Text_20_body"><text:s text:c="4"/>C'est le moment d'anticiper la partie "Artisan" dont nous parlions :</text:p>
      <text:p text:style-name="P1"><text:span text:style-name="T1">"J'ai mené cette phase avec une approche </text:span><text:span text:style-name="Strong_20_Emphasis"><text:span text:style-name="T1">Mobile First</text:span></text:span><text:span text:style-name="T1">. La prochaine étape de mon dossier illustrera l'adaptation de ce design au format </text:span><text:span text:style-name="Strong_20_Emphasis"><text:span text:style-name="T1">Desktop</text:span></text:span><text:span text:style-name="T1"> (ordinateur), où la lecture du Sanctuaire prendra toute son ampleur sur grand écran."</text:span></text:p>
      <text:p text:style-name="Horizontal_20_Line"/>
      <text:h text:style-name="Heading_20_3" text:outline-level="3"><text:soft-page-break/></text:h>
      <text:h text:style-name="Heading_20_3" text:outline-level="3">3.3 <text:span text:style-name="Titre_5f_Vert">La Phase de "Grisaille" (Wireframing)</text:span></text:h>
      <text:p text:style-name="Text_20_body"/>
      <text:p text:style-name="Text_20_body">Avant d'intégrer l'identité visuelle, j'ai réalisé l'intégralité du site en basse fidélité. Cette étape, appelée "Wireframing", permet de valider la hiérarchie de l'information et le parcours utilisateur sans être distrait par l'esthétique.</text:p>
      <text:p text:style-name="Text_20_body"/>
      <text:p text:style-name="Text_20_body"><text:span text:style-name="Strong_20_Emphasis">L'intérêt de cette approche pour L'EMPREINTE :</text:span></text:p>
      <text:p text:style-name="Text_20_body"><text:span text:style-name="Strong_20_Emphasis"/></text:p>
      <text:list xml:id="list932697536" text:style-name="L3">
        <text:list-item>
          <text:p text:style-name="P17"><text:span text:style-name="Strong_20_Emphasis">Épurer avant d'habiller :</text:span> S'assurer que chaque bouton et chaque texte a une fonction thérapeutique ou commerciale réelle.</text:p>
        </text:list-item>
        <text:list-item>
          <text:p text:style-name="P17"><text:span text:style-name="Strong_20_Emphasis">Validation des flux :</text:span> Vérifier que le passage du "Savoir" (le Sanctuaire) à l'"Action" (la Prise de RDV) est naturel.</text:p>
        </text:list-item>
      </text:list>
      <text:p text:style-name="Text_20_body"/>
      <text:p text:style-name="Text_20_body"/>
      <text:p text:style-name="Text_20_body"/>
      <text:h text:style-name="Heading_20_3" text:outline-level="3">3.4 <text:span text:style-name="Titre_5f_Vert">Focus sur l'Arborescence Mobile-First</text:span></text:h>
      <text:p text:style-name="Text_20_body"/>
      <text:p text:style-name="Text_20_body"/>
      <text:p text:style-name="Text_20_body">Le passage de la structure basse fidélité au rendu final illustre la matérialisation de l'intention thérapeutique. La Figure 4 présente ce travail de précision sur la page d'accueil, pivot central de l'expérience utilisateur.</text:p>
      <text:p text:style-name="P21"/>
      <table:table table:name="Tableau1" table:style-name="Tableau1">
        <table:table-column table:style-name="Tableau1.A" table:number-columns-repeated="2"/>
        <text:soft-page-break/>
        <table:table-row table:style-name="Tableau1.1">
          <table:table-cell table:style-name="Tableau1.A1" office:value-type="string">
            <text:p text:style-name="P11"><draw:frame draw:style-name="fr2" draw:name="Image1" text:anchor-type="paragraph" svg:x="3cm" svg:y="0cm" svg:width="4.678cm" svg:height="24.017cm" draw:z-index="2"><draw:image xlink:href="Pictures/1000000000000189000008FE524A4443A13A948E.jpg" xlink:type="simple" xlink:show="embed" xlink:actuate="onLoad" draw:mime-type="image/jpeg"/></draw:frame></text:p>
          </table:table-cell>
          <table:table-cell table:style-name="Tableau1.A1" office:value-type="string">
            <text:p text:style-name="P7"><draw:frame draw:style-name="fr1" draw:name="Image2" text:anchor-type="paragraph" svg:x="1.18cm" svg:width="4.193cm" svg:height="23.98cm" draw:z-index="0"><draw:image xlink:href="Pictures/100000000000018900000A3912333E94A886D9C3.jpg" xlink:type="simple" xlink:show="embed" xlink:actuate="onLoad" draw:mime-type="image/jpeg"/></draw:frame></text:p>
          </table:table-cell>
        </table:table-row>
      </table:table>
      <text:p text:style-name="P10"><text:span text:style-name="Strong_20_Emphasis"><text:span text:style-name="T7">Figure 4 : Évolution de la structure d'accueil : de la hiérarchie des masses au </text:span></text:span><text:span text:style-name="Strong_20_Emphasis"><text:span text:style-name="T8">rendu </text:span></text:span><text:span text:style-name="Strong_20_Emphasis"><text:span text:style-name="T7">Zen final.</text:span></text:span></text:p>
      <text:p text:style-name="Text_20_body"><text:soft-page-break/><text:span text:style-name="Strong_20_Emphasis"><text:span text:style-name="T7"/></text:span></text:p>
      <text:p text:style-name="Text_20_body"><text:span text:style-name="Strong_20_Emphasis"/></text:p>
      <text:p text:style-name="Text_20_body"><text:span text:style-name="Strong_20_Emphasis"/></text:p>
      <text:p text:style-name="P9"><text:span text:style-name="Strong_20_Emphasis">A. </text:span><text:span text:style-name="Titre_5f_Vert">La Navigation et le Header (L'entrée dans le cabinet)</text:span></text:p>
      <text:p text:style-name="P9"/>
      <text:p text:style-name="P9">J'ai conçu un header minimaliste. Le menu n'est pas une simple liste, mais un <text:span text:style-name="Strong_20_Emphasis">Overlay</text:span> (écran de recouvrement) qui permet de garder le focus sur la recherche.</text:p>
      <text:p text:style-name="P9"/>
      <text:list xml:id="list2182570903" text:style-name="L4">
        <text:list-item>
          <text:p text:style-name="P18"><text:span text:style-name="T1">Particularité :</text:span> Intégration d'un accès rapide à l'Espace Personnel via l'icône profil.</text:p>
        </text:list-item>
      </text:list>
      <text:p text:style-name="Text_20_body"/>
      <text:p text:style-name="Text_20_body"/>
      <text:list xml:id="list144908204035474" text:continue-numbering="true" text:style-name="L4">
        <text:list-header>
          <text:p text:style-name="P18"/>
        </text:list-header>
      </text:list>
      <text:p text:style-name="P9"><text:span text:style-name="Strong_20_Emphasis">B. </text:span><text:span text:style-name="Titre_5f_Vert">Le Flux de Synchronicité (De l'échange au soin)</text:span></text:p>
      <text:p text:style-name="P9"/>
      <text:p text:style-name="P9">Les wireframes de la page <text:span text:style-name="Strong_20_Emphasis">"Échanges"</text:span> et de l'<text:span text:style-name="Strong_20_Emphasis">"Agenda"</text:span> montrent une structure épurée. L'objectif est de réduire l'anxiété du patient. Les créneaux horaires sont présentés de manière aérée pour faciliter la sélection tactile.</text:p>
      <text:p text:style-name="Text_20_body"/>
      <text:p text:style-name="Text_20_body"/>
      <text:p text:style-name="Text_20_body"/>
      <text:p text:style-name="P9"><text:span text:style-name="Strong_20_Emphasis">C. </text:span><text:span text:style-name="Titre_5f_Vert">L'Administration : Un véritable outil métier</text:span></text:p>
      <text:p text:style-name="P9"/>
      <text:p text:style-name="P9">Les planches concernant le <text:span text:style-name="Strong_20_Emphasis">Dashboard Admin</text:span> et la <text:span text:style-name="Strong_20_Emphasis">Gestion du Catalogue</text:span> prouvent que l'application est conçue pour l'efficacité. J'ai privilégié des formulaires clairs avec des zones de saisie larges pour permettre à Sandrine de gérer son cabinet même en déplacement.</text:p>
      <text:p text:style-name="Standard"><text:soft-page-break/></text:p>
      <text:p text:style-name="Standard"/>
      <text:p text:style-name="Standard"/>
      <text:p text:style-name="Standard"><text:s text:c="7"/>Au-delà de l'esthétique, la conception visuelle a été pensée pour anticiper le développement technique. En adoptant une approche granulaire, j'ai assuré la cohérence du projet tout en optimisant la future base de code.</text:p>
      <text:p text:style-name="Standard"/>
      <text:p text:style-name="Standard"/>
      <text:p text:style-name="Standard"/>
      <text:p text:style-name="Standard"/>
      <text:p text:style-name="P3"/>
      <text:p text:style-name="P6"/>
      <text:p text:style-name="P6"/>
      <text:p text:style-name="P6"/>
      <table:table table:name="Tableau2" table:style-name="Tableau2">
        <table:table-column table:style-name="Tableau2.A"/>
        <table:table-row>
          <table:table-cell table:style-name="Tableau2.A1" office:value-type="string">
            <text:p text:style-name="P8"><text:span text:style-name="Strong_20_Emphasis"/></text:p>
            <text:p text:style-name="P8"><text:span text:style-name="Strong_20_Emphasis"><text:span text:style-name="T6">FOCUS : MODULARITÉ ET RÉUTILISABILITÉ</text:span></text:span></text:p>
            <text:p text:style-name="P8"><text:span text:style-name="Strong_20_Emphasis"/></text:p>
          </table:table-cell>
        </table:table-row>
      </table:table>
      <text:p text:style-name="P6"><text:soft-page-break/></text:p>
      <text:p text:style-name="P6"/>
      <text:p text:style-name="P6"/>
      <text:p text:style-name="P6"/>
      <text:p text:style-name="P6"><draw:frame draw:style-name="fr3" draw:name="Image4" text:anchor-type="char" svg:x="1.542cm" svg:y="0.191cm" svg:width="13.864cm" svg:height="2.434cm" draw:z-index="3"><draw:image xlink:href="Pictures/100000000000018900000045B4DE267F4748436E.jpg" xlink:type="simple" xlink:show="embed" xlink:actuate="onLoad" draw:mime-type="image/jpeg"/></draw:frame></text:p>
      <text:p text:style-name="P4"><text:s text:c="29"/></text:p>
      <text:p text:style-name="P4"><text:tab/><text:tab/><text:tab/><text:tab/><text:span text:style-name="T5">Organisme (Composant complexe)</text:span></text:p>
      <text:p text:style-name="P6"/>
      <text:p text:style-name="P6"/>
      <text:p text:style-name="P6"/>
      <text:p text:style-name="P6"/>
      <text:p text:style-name="P6"/>
      <text:p text:style-name="P6"/>
      <text:p text:style-name="P6"/>
      <text:p text:style-name="P6"><draw:frame draw:style-name="fr3" draw:name="Image3" text:anchor-type="char" svg:x="0.762cm" svg:y="0.026cm" svg:width="6.668cm" svg:height="1.305cm" draw:z-index="1"><draw:image xlink:href="Pictures/10000000000000BD000000254169F9F72411C7B0.jpg" xlink:type="simple" xlink:show="embed" xlink:actuate="onLoad" draw:mime-type="image/jpeg"/></draw:frame><draw:frame draw:style-name="fr3" draw:name="Image5" text:anchor-type="char" svg:x="10.694cm" svg:y="0.069cm" svg:width="6.35cm" svg:height="1.335cm" draw:z-index="4"><draw:image xlink:href="Pictures/10000000000000B4000000224488A7BCC3E30784.jpg" xlink:type="simple" xlink:show="embed" xlink:actuate="onLoad" draw:mime-type="image/jpeg"/></draw:frame></text:p>
      <text:p text:style-name="P6"><text:soft-page-break/></text:p>
      <text:p text:style-name="P4"><text:s text:c="62"/></text:p>
      <text:p text:style-name="P4"><text:tab/><text:tab/><text:tab/><text:tab/><text:tab/><text:span text:style-name="T5">Atomes (Composants simples)</text:span></text:p>
      <text:p text:style-name="P6"/>
      <text:p text:style-name="P6"/>
      <text:p text:style-name="P2"><text:s text:c="3"/>Dès la phase de design, j'ai adopté une approche par composants (<text:span text:style-name="T4">Atomic Design</text:span>). Chaque élément d'interface (boutons, champs de saisie, headers) a été conçu comme un module indépendant. Cette rigueur en amont facilite l'implémentation dans Symfony, en respectant le principe <text:span text:style-name="Strong_20_Emphasis">DRY (Don't Repeat Yourself)</text:span> et en assurant une maintenance simplifiée du code CSS.</text:p>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rmorant Garamond" svg:font-family="'Cormorant Garamond'" style:font-adornments="Italique" style:font-pitch="variable"/>
    <style:font-face style:name="Cormorant Garamond1" svg:font-family="'Cormorant Garamond'" style:font-adornments="Italique gras" style:font-pitch="variable"/>
    <style:font-face style:name="Cormorant Garamond2" svg:font-family="'Cormorant Garamond'" style:font-adornments="Normal" style:font-pitch="variable"/>
    <style:font-face style:name="EB Garamond" svg:font-family="'EB Garamond'" style:font-adornments="Norma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1.101cm" fo:margin-bottom="0cm" style:contextual-spacing="false"/>
      <style:text-properties fo:color="#2d2926" loext:opacity="100%" style:font-name="Cormorant Garamond2" fo:font-family="'Cormorant Garamond'" style:font-style-name="Normal"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522cm" style:contextual-spacing="false" fo:line-height="115%" fo:text-align="justify" style:justify-single-word="false" fo:hyphenation-ladder-count="no-limit" fo:text-indent="0.57cm" style:auto-text-indent="false" style:page-number="auto"/>
      <style:text-properties style:font-name="EB Garamond" fo:font-family="'EB Garamond'" style:font-style-name="Normal" style:font-pitch="variable"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8a9a5b" loext:opacity="100%" style:font-name="Cormorant Garamond" fo:font-family="'Cormorant Garamond'" style:font-style-name="Italique" style:font-pitch="variable" fo:font-size="32pt" fo:font-style="italic" fo:font-weight="bold" style:font-name-asian="Noto Serif CJK SC" style:font-family-asian="'Noto Serif CJK SC'" style:font-family-generic-asian="system" style:font-pitch-asian="variable" style:font-size-asian="24pt" style:language-asian="zxx" style:country-asian="none"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903cm" fo:margin-bottom="0.215cm" style:contextual-spacing="false"/>
      <style:text-properties fo:color="#2d2926" loext:opacity="100%" style:font-name="Cormorant Garamond1" fo:font-family="'Cormorant Garamond'" style:font-style-name="Italique gras" style:font-pitch="variable" fo:font-size="24pt" fo:font-style="normal"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1.072cm" fo:margin-bottom="0.215cm" style:contextual-spacing="false"/>
      <style:text-properties fo:color="#2d2926" loext:opacity="100%" style:font-name="Cormorant Garamond1" fo:font-family="'Cormorant Garamond'" style:font-style-name="Italique gras" style:font-pitch="variable" fo:font-size="18pt" fo:font-style="italic"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color="#2d2926" loext:opacity="100%" style:font-name="Cormorant Garamond1" fo:font-family="'Cormorant Garamond'" style:font-style-name="Italique gras" style:font-pitch="variable" fo:font-style="italic" fo:font-weight="bold"/>
    </style:style>
    <style:style style:name="Vertical_20_Numbering_20_Symbols" style:display-name="Vertical Numbering Symbols" style:family="text">
      <style:text-properties fo:color="#2d2926" loext:opacity="100%" style:text-rotation-angle="90" style:text-rotation-scale="line-height"/>
    </style:style>
    <style:style style:name="Titre_5f_Vert" style:display-name="Titre_Vert" style:family="text" style:parent-style-name="Strong_20_Emphasis">
      <style:text-properties fo:color="#8a9a5b" loext:opacity="100%"/>
    </style:style>
    <style:style style:name="Drop_20_Caps" style:display-name="Drop Cap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07T16:24:39.670622541</meta:creation-date>
    <dc:date>2026-07-13T14:49:06.989626894</dc:date>
    <meta:editing-duration>PT11M57S</meta:editing-duration>
    <meta:editing-cycles>8</meta:editing-cycles>
    <meta:generator>LibreOffice/7.3.7.2$Linux_X86_64 LibreOffice_project/30$Build-2</meta:generator>
    <meta:document-statistic meta:table-count="2" meta:image-count="5" meta:object-count="0" meta:page-count="8" meta:paragraph-count="44" meta:word-count="752" meta:character-count="4922" meta:non-whitespace-character-count="4106"/>
  </office:meta>
</office:document-meta>
</file>