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4000001A456A5BA77012118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f5d75" officeooo:paragraph-rsid="000f5d75"/>
    </style:style>
    <style:style style:name="P2" style:family="paragraph" style:parent-style-name="Heading_20_1">
      <style:text-properties officeooo:rsid="000ff466" officeooo:paragraph-rsid="000ff466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0f5d75" officeooo:paragraph-rsid="000f5d75"/>
    </style:style>
    <style:style style:name="P5" style:family="paragraph" style:parent-style-name="Text_20_body">
      <style:text-properties officeooo:rsid="000f5d75" officeooo:paragraph-rsid="000f5d75"/>
    </style:style>
    <style:style style:name="P6" style:family="paragraph" style:parent-style-name="Text_20_body">
      <style:text-properties officeooo:paragraph-rsid="000f5d75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text-properties officeooo:rsid="000ff466" officeooo:paragraph-rsid="000ff466"/>
    </style:style>
    <style:style style:name="T1" style:family="text">
      <style:text-properties officeooo:rsid="000ff46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Vue d’ensemble avec quoi ? Dans quelle colonne ? Est-ce que tu t’y retrouve ou as tu besoin de captures plus lisibes ?</text:p>
      <text:p text:style-name="P4"/>
      <text:p text:style-name="P4">2 les us 1 et 2 : on vient de les gérer, elles sont dans done et tu connais leur description</text:p>
      <text:p text:style-name="P4"/>
      <text:p text:style-name="P4">3 La 3 je te l’ai montrée aussi</text:p>
      <text:p text:style-name="P4"/>
      <text:p text:style-name="P4">4 la 4 : tu as le titre, voici la description :</text:p>
      <text:p text:style-name="P4"/>
      <text:p text:style-name="P6"><text:span text:style-name="Source_20_Text">En tant que client, je veux pouvoir accéder à mon espace sécurisé afin de retrouver l'historique de mes échanges et de gérer mes informations personnelles.</text:span></text:p>
      <text:p text:style-name="Text_20_body">Critères d'acceptation :</text:p>
      <text:p text:style-name="Preformatted_20_Text"><text:span text:style-name="Source_20_Text">CA 1 : Inscription et connexion sécurisées avec un design invitant au calme.</text:span></text:p>
      <text:p text:style-name="Preformatted_20_Text"/>
      <text:p text:style-name="Preformatted_20_Text"><text:span text:style-name="Source_20_Text">CA 2 : Possibilité de renseigner et d'actualiser ses informations de contact (téléphone, email) pour garantir la qualité du lien avec la praticienne.</text:span></text:p>
      <text:p text:style-name="Preformatted_20_Text"/>
      <text:p text:style-name="P3"><text:span text:style-name="Source_20_Text">CA 3 : Accès simplifié via un lien direct après une réservation (fluidité du parcours).</text:span></text:p>
      <text:p text:style-name="P6"><text:span text:style-name="Source_20_Text"/></text:p>
      <text:p text:style-name="P4">5 la 5 : comme la 4 tu as le titre, la description :</text:p>
      <text:p text:style-name="P4"/>
      <text:p text:style-name="P6"><text:span text:style-name="Source_20_Text">En tant que client, je veux visualiser mes séances passées et à venir afin de suivre mon évolution et de m'organiser sereinement.</text:span></text:p>
      <text:p text:style-name="Text_20_body">Critères d'acceptation :</text:p>
      <text:p text:style-name="Preformatted_20_Text"><text:span text:style-name="Source_20_Text">CA 1 : Liste chronologique des rendez-vous avec le type de prestation associée.</text:span></text:p>
      <text:p text:style-name="Preformatted_20_Text"/>
      <text:p text:style-name="Preformatted_20_Text"><text:span text:style-name="Source_20_Text">CA 2 : Possibilité d'annuler ou de déplacer un rendez-vous (selon les règles de délais définies par la praticienne).</text:span></text:p>
      <text:p text:style-name="Preformatted_20_Text"/>
      <text:p text:style-name="P3"><text:span text:style-name="Source_20_Text">CA 3 : Distinction visuelle claire entre les soins réalisés (travail accompli) et les soins planifiés.</text:span></text:p>
      <text:p text:style-name="P6"><text:span text:style-name="Source_20_Text"/></text:p>
      <text:p text:style-name="P4">6 idem pour la 6 :</text:p>
      <text:p text:style-name="P4"/>
      <text:p text:style-name="P4"/>
      <text:p text:style-name="P5">En tant que client engagé dans un suivi, je veux connaître le solde de mes séances restantes afin de planifier mon prochain soin.</text:p>
      <text:p text:style-name="Text_20_body">Critères d'acceptation :</text:p>
      <text:p text:style-name="Preformatted_20_Text"><text:span text:style-name="Source_20_Text">CA 1 : Affichage d'un compteur de séances restantes (forfaits 3 ou 5).</text:span></text:p>
      <text:p text:style-name="Preformatted_20_Text"/>
      <text:p text:style-name="Preformatted_20_Text"><text:span text:style-name="Source_20_Text">CA 2 : Information sur la date de validité du forfait.</text:span></text:p>
      <text:p text:style-name="Preformatted_20_Text"/>
      <text:p text:style-name="P3"><text:span text:style-name="Source_20_Text">CA 3 : Accès direct au calendrier de réservation dès qu'une séance de forfait est disponible.</text:span></text:p>
      <text:p text:style-name="P4">7 :</text:p>
      <text:p text:style-name="P5"><text:soft-page-break/>En tant que client, je veux offrir un soin à un proche afin de partager les bienfaits de l'approche de Sandrine Tribhou via un parcours fluide, élégant et personnel.</text:p>
      <text:p text:style-name="Text_20_body">Critères d'acceptation :</text:p>
      <text:p text:style-name="Preformatted_20_Text"><text:span text:style-name="Source_20_Text">CA 1 : Possibilité de choisir une prestation spécifique ou un parcours (forfait) à offrir depuis le catalogue.</text:span></text:p>
      <text:p text:style-name="Preformatted_20_Text"/>
      <text:p text:style-name="Preformatted_20_Text"><text:span text:style-name="Source_20_Text">CA 2 : Formulaire de personnalisation invitant à l'attention (Nom du donateur, du bénéficiaire et message d'intention).</text:span></text:p>
      <text:p text:style-name="Preformatted_20_Text"/>
      <text:p text:style-name="P3"><text:span text:style-name="Source_20_Text">CA 3 : Validation sécurisée de l'acte de don, garantissant la bonne prise en compte de la demande et de son règlement.</text:span></text:p>
      <text:p text:style-name="P4"/>
      <text:p text:style-name="P4"/>
      <text:p text:style-name="P4">8 :</text:p>
      <text:p text:style-name="P4"/>
      <text:p text:style-name="P5">En tant qu'acheteur, je veux recevoir un document raffiné contenant un code unique afin de pouvoir remettre un cadeau de qualité au bénéficiaire.</text:p>
      <text:p text:style-name="Text_20_body">Critères d'acceptation :</text:p>
      <text:p text:style-name="Preformatted_20_Text"><text:span text:style-name="Source_20_Text">CA 1 : Génération automatique d'un code d'activation unique et sécurisé en base de données.</text:span></text:p>
      <text:p text:style-name="Preformatted_20_Text"/>
      <text:p text:style-name="Preformatted_20_Text"><text:span text:style-name="Source_20_Text">CA 2 : Création d'une facture PDF et d'un document "Carte Expérience" au design épuré, prêt à être imprimé ou transmis.</text:span></text:p>
      <text:p text:style-name="Preformatted_20_Text"/>
      <text:p text:style-name="P3"><text:span text:style-name="Source_20_Text">CA 3 : Envoi immédiat d'un email de confirmation de commande incluant le précieux sésame.</text:span></text:p>
      <text:h text:style-name="P1" text:outline-level="1"><text:a xlink:type="simple" xlink:href="https://github.com/PaulOcho26/l-empreinte-shiatsu-sf/issues/9" text:style-name="Internet_20_link" text:visited-style-name="Visited_20_Internet_20_Link">#9</text:a></text:h>
      <text:p text:style-name="P7">Open</text:p>
      <text:p text:style-name="P7"><text:a xlink:type="simple" xlink:href="https://github.com/PaulOcho26" text:style-name="Internet_20_link" text:visited-style-name="Visited_20_Internet_20_Link">PaulOcho26</text:a>/<text:a xlink:type="simple" xlink:href="https://github.com/PaulOcho26/l-empreinte-shiatsu-sf" text:style-name="Internet_20_link" text:visited-style-name="Visited_20_Internet_20_Link">l-empreinte-shiatsu-sf</text:a></text:p>
      <text:p text:style-name="Text_20_body">Public</text:p>
      <text:h text:style-name="Heading_20_2" text:outline-level="2">Description</text:h>
      <text:p text:style-name="P7"><draw:a xlink:type="simple" xlink:href="https://github.com/PaulOcho26"><draw:frame draw:style-name="fr1" draw:name="Image1" text:anchor-type="as-char" svg:width="0.688cm" svg:height="0.688cm" draw:z-index="0"><draw:image xlink:href="Pictures/10000000000001A4000001A456A5BA770121189B.png" xlink:type="simple" xlink:show="embed" xlink:actuate="onLoad" draw:mime-type="image/png"/><svg:title>@PaulOcho26</svg:title></draw:frame></draw:a></text:p>
      <text:p text:style-name="P7"><text:a xlink:type="simple" xlink:href="https://github.com/PaulOcho26" text:style-name="Internet_20_link" text:visited-style-name="Visited_20_Internet_20_Link">PaulOcho26</text:a></text:p>
      <text:p text:style-name="P7">opened <text:a xlink:type="simple" xlink:href="https://github.com/PaulOcho26/l-empreinte-shiatsu-sf/issues/9#issue-4446018821" text:style-name="Internet_20_link" text:visited-style-name="Visited_20_Internet_20_Link">on May 14</text:a></text:p>
      <text:p text:style-name="P7">Owner</text:p>
      <text:section text:style-name="Sect1" text:name="issue-body-viewer">
        <text:p text:style-name="Text_20_body">En tant que bénéficiaire d'une Carte Expérience, je veux utiliser mon code unique pour réserver ma séance en toute simplicité.</text:p>
        <text:p text:style-name="Text_20_body">Critères d'acceptation :</text:p>
        <text:p text:style-name="Preformatted_20_Text"><text:span text:style-name="Source_20_Text">CA 1 : Espace dédié à la saisie du code sur le calendrier de réservation (US 3).</text:span></text:p>
        <text:p text:style-name="Preformatted_20_Text"/>
        <text:p text:style-name="Preformatted_20_Text"><text:span text:style-name="Source_20_Text">CA 2 : Vérification instantanée de la validité du code et de la prestation offerte.</text:span></text:p>
        <text:p text:style-name="Preformatted_20_Text"/>
        <text:p text:style-name="P3"><text:soft-page-break/><text:span text:style-name="Source_20_Text">CA 3 : Validation de la séance sans transaction monétaire (le code fait office de paiement).</text:span></text:p>
      </text:section>
      <text:h text:style-name="P1" text:outline-level="1"><text:a xlink:type="simple" xlink:href="https://github.com/PaulOcho26/l-empreinte-shiatsu-sf/issues/10" text:style-name="Internet_20_link" text:visited-style-name="Visited_20_Internet_20_Link">#10</text:a></text:h>
      <text:p text:style-name="P7">Open</text:p>
      <text:p text:style-name="P7"><text:a xlink:type="simple" xlink:href="https://github.com/PaulOcho26" text:style-name="Internet_20_link" text:visited-style-name="Visited_20_Internet_20_Link">PaulOcho26</text:a>/<text:a xlink:type="simple" xlink:href="https://github.com/PaulOcho26/l-empreinte-shiatsu-sf" text:style-name="Internet_20_link" text:visited-style-name="Visited_20_Internet_20_Link">l-empreinte-shiatsu-sf</text:a></text:p>
      <text:p text:style-name="Text_20_body">Public</text:p>
      <text:h text:style-name="Heading_20_2" text:outline-level="2">Description</text:h>
      <text:p text:style-name="P7"><draw:a xlink:type="simple" xlink:href="https://github.com/PaulOcho26"><draw:frame draw:style-name="fr1" draw:name="Image2" text:anchor-type="as-char" svg:width="0.688cm" svg:height="0.688cm" draw:z-index="1"><draw:image xlink:href="Pictures/10000000000001A4000001A456A5BA770121189B.png" xlink:type="simple" xlink:show="embed" xlink:actuate="onLoad" draw:mime-type="image/png"/><svg:title>@PaulOcho26</svg:title></draw:frame></draw:a></text:p>
      <text:p text:style-name="P7"><text:a xlink:type="simple" xlink:href="https://github.com/PaulOcho26" text:style-name="Internet_20_link" text:visited-style-name="Visited_20_Internet_20_Link">PaulOcho26</text:a></text:p>
      <text:p text:style-name="P7">opened <text:a xlink:type="simple" xlink:href="https://github.com/PaulOcho26/l-empreinte-shiatsu-sf/issues/10#issue-4453318809" text:style-name="Internet_20_link" text:visited-style-name="Visited_20_Internet_20_Link">on May 15</text:a></text:p>
      <text:p text:style-name="P7">Owner</text:p>
      <text:section text:style-name="Sect1" text:name="Section1">
        <text:p text:style-name="Text_20_body"><text:bookmark text:name="issue-body-viewer"/>En tant que praticienne, je veux disposer d'une vue d'ensemble de mon activité dès ma connexion afin d'organiser mes journées de soin avec sérénité.</text:p>
        <text:p text:style-name="Text_20_body">Critères d'acceptation :</text:p>
        <text:p text:style-name="Preformatted_20_Text"><text:span text:style-name="Source_20_Text">CA 1 : Vue immédiate sur l'agenda du jour et de la semaine (prochains rendez-vous).</text:span></text:p>
        <text:p text:style-name="Preformatted_20_Text"/>
        <text:p text:style-name="Preformatted_20_Text"><text:span text:style-name="Source_20_Text">CA 2 : Indicateurs clés d'activité (Chiffre d'affaires réalisé, nombre de soins prévus).</text:span></text:p>
        <text:p text:style-name="Preformatted_20_Text"/>
        <text:p text:style-name="Preformatted_20_Text"><text:span text:style-name="Source_20_Text">CA 3 : Système d'alertes visuelles pour les nouvelles demandes de dialogue (US 2) non traitées.</text:span></text:p>
        <text:p text:style-name="Preformatted_20_Text"/>
        <text:p text:style-name="P3"><text:span text:style-name="Source_20_Text">CA 4 : Accès rapide aux fonctions de création de rendez-vous manuels (pour les prises de RDV par téléphone).</text:span></text:p>
      </text:section>
      <text:h text:style-name="P1" text:outline-level="1"><text:a xlink:type="simple" xlink:href="https://github.com/PaulOcho26/l-empreinte-shiatsu-sf/issues/11" text:style-name="Internet_20_link" text:visited-style-name="Visited_20_Internet_20_Link">#11</text:a></text:h>
      <text:p text:style-name="P7">Open</text:p>
      <text:p text:style-name="P7"><text:a xlink:type="simple" xlink:href="https://github.com/PaulOcho26" text:style-name="Internet_20_link" text:visited-style-name="Visited_20_Internet_20_Link">PaulOcho26</text:a>/<text:a xlink:type="simple" xlink:href="https://github.com/PaulOcho26/l-empreinte-shiatsu-sf" text:style-name="Internet_20_link" text:visited-style-name="Visited_20_Internet_20_Link">l-empreinte-shiatsu-sf</text:a></text:p>
      <text:p text:style-name="Text_20_body">Public</text:p>
      <text:h text:style-name="Heading_20_2" text:outline-level="2">Description</text:h>
      <text:p text:style-name="P7"><draw:a xlink:type="simple" xlink:href="https://github.com/PaulOcho26"><draw:frame draw:style-name="fr1" draw:name="Image3" text:anchor-type="as-char" svg:width="0.688cm" svg:height="0.688cm" draw:z-index="2"><draw:image xlink:href="Pictures/10000000000001A4000001A456A5BA770121189B.png" xlink:type="simple" xlink:show="embed" xlink:actuate="onLoad" draw:mime-type="image/png"/><svg:title>@PaulOcho26</svg:title></draw:frame></draw:a></text:p>
      <text:p text:style-name="P7"><text:a xlink:type="simple" xlink:href="https://github.com/PaulOcho26" text:style-name="Internet_20_link" text:visited-style-name="Visited_20_Internet_20_Link">PaulOcho26</text:a></text:p>
      <text:p text:style-name="P7">opened <text:a xlink:type="simple" xlink:href="https://github.com/PaulOcho26/l-empreinte-shiatsu-sf/issues/11#issue-4453333767" text:style-name="Internet_20_link" text:visited-style-name="Visited_20_Internet_20_Link">on May 15</text:a></text:p>
      <text:p text:style-name="P7">Owner</text:p>
      <text:section text:style-name="Sect1" text:name="Section2">
        <text:p text:style-name="Text_20_body"><text:bookmark text:name="issue-body-viewer1"/>En tant que praticienne, je veux accéder aux dossiers complets de mes patients afin de garantir la continuité et la qualité de leur accompagnement.</text:p>
        <text:p text:style-name="Text_20_body">Critères d'acceptation :</text:p>
        <text:p text:style-name="Preformatted_20_Text"><text:span text:style-name="Source_20_Text">CA 1 : Liste exhaustive des patients avec moteur de recherche par nom ou email.</text:span></text:p>
        <text:p text:style-name="Preformatted_20_Text"><text:soft-page-break/></text:p>
        <text:p text:style-name="Preformatted_20_Text"><text:span text:style-name="Source_20_Text">CA 2 : Fiche patient individuelle regroupant les coordonnées et l'historique complet des soins reçus.</text:span></text:p>
        <text:p text:style-name="Preformatted_20_Text"/>
        <text:p text:style-name="Preformatted_20_Text"><text:span text:style-name="Source_20_Text">CA 3 : Centralisation des échanges préalables (messages de l'US 2) au sein du dossier patient.</text:span></text:p>
        <text:p text:style-name="Preformatted_20_Text"/>
        <text:p text:style-name="P3"><text:span text:style-name="Source_20_Text">CA 4 : Visualisation en temps réel du solde de forfaits (séances restantes) et des cartes cadeaux activées pour ce patient.</text:span></text:p>
      </text:section>
      <text:h text:style-name="P1" text:outline-level="1"><text:a xlink:type="simple" xlink:href="https://github.com/PaulOcho26/l-empreinte-shiatsu-sf/issues/12" text:style-name="Internet_20_link" text:visited-style-name="Visited_20_Internet_20_Link">#12</text:a></text:h>
      <text:p text:style-name="P7">Open</text:p>
      <text:p text:style-name="P7"><text:a xlink:type="simple" xlink:href="https://github.com/PaulOcho26" text:style-name="Internet_20_link" text:visited-style-name="Visited_20_Internet_20_Link">PaulOcho26</text:a>/<text:a xlink:type="simple" xlink:href="https://github.com/PaulOcho26/l-empreinte-shiatsu-sf" text:style-name="Internet_20_link" text:visited-style-name="Visited_20_Internet_20_Link">l-empreinte-shiatsu-sf</text:a></text:p>
      <text:p text:style-name="Text_20_body">Public</text:p>
      <text:h text:style-name="Heading_20_2" text:outline-level="2">Description</text:h>
      <text:p text:style-name="P7"><draw:a xlink:type="simple" xlink:href="https://github.com/PaulOcho26"><draw:frame draw:style-name="fr1" draw:name="Image4" text:anchor-type="as-char" svg:width="0.688cm" svg:height="0.688cm" draw:z-index="3"><draw:image xlink:href="Pictures/10000000000001A4000001A456A5BA770121189B.png" xlink:type="simple" xlink:show="embed" xlink:actuate="onLoad" draw:mime-type="image/png"/><svg:title>@PaulOcho26</svg:title></draw:frame></draw:a></text:p>
      <text:p text:style-name="P7"><text:a xlink:type="simple" xlink:href="https://github.com/PaulOcho26" text:style-name="Internet_20_link" text:visited-style-name="Visited_20_Internet_20_Link">PaulOcho26</text:a></text:p>
      <text:p text:style-name="P7">opened <text:a xlink:type="simple" xlink:href="https://github.com/PaulOcho26/l-empreinte-shiatsu-sf/issues/12#issue-4453345442" text:style-name="Internet_20_link" text:visited-style-name="Visited_20_Internet_20_Link">on May 15</text:a></text:p>
      <text:p text:style-name="P7">Owner</text:p>
      <text:section text:style-name="Sect1" text:name="Section3">
        <text:p text:style-name="Text_20_body"><text:bookmark text:name="issue-body-viewer2"/>En tant que praticienne, je veux définir les détails de mes offres et mon planning d'ouverture afin que l'organisation du cabinet soit toujours le reflet exact de ma réalité.</text:p>
        <text:p text:style-name="Text_20_body">Critères d'acceptation :</text:p>
        <text:p text:style-name="Preformatted_20_Text"><text:span text:style-name="Source_20_Text">CA 1 : Interface de gestion des prestations (Ajouter/Modifier un titre, un prix, une description et surtout une durée précise).</text:span></text:p>
        <text:p text:style-name="Preformatted_20_Text"/>
        <text:p text:style-name="Preformatted_20_Text"><text:span text:style-name="Source_20_Text">CA 2 : Configuration des horaires d'ouverture hebdomadaires (Lundi au Vendredi, plages horaires).</text:span></text:p>
        <text:p text:style-name="Preformatted_20_Text"/>
        <text:p text:style-name="Preformatted_20_Text"><text:span text:style-name="Source_20_Text">CA 3 : Possibilité de déclarer des périodes d'absence (congés, formations) bloquant instantanément la prise de rendez-vous sur le site.</text:span></text:p>
        <text:p text:style-name="Preformatted_20_Text"/>
        <text:p text:style-name="P3"><text:span text:style-name="Source_20_Text">CA 4 : Définition d'un "temps de respiration" (temps de battement) automatique entre deux rendez-vous pour préparer la salle.</text:span></text:p>
      </text:section>
      <text:p text:style-name="P4">Ensuite, ce ne sont plus exactement des us, voici - ce ui <text:span text:style-name="T1">est dans « in progress »</text:span> :</text:p>
      <text:p text:style-name="P4"/>
      <text:h text:style-name="P1" text:outline-level="1">UI : Design Page Philosophie (Desktop)</text:h>
      <text:p text:style-name="P5"/>
      <text:h text:style-name="P1" text:outline-level="1"><text:a xlink:type="simple" xlink:href="https://github.com/PaulOcho26/l-empreinte-shiatsu-sf/issues/22" text:style-name="Internet_20_link" text:visited-style-name="Visited_20_Internet_20_Link">#22</text:a></text:h>
      <text:p text:style-name="P7">Open</text:p>
      <text:p text:style-name="P7"><text:a xlink:type="simple" xlink:href="https://github.com/PaulOcho26" text:style-name="Internet_20_link" text:visited-style-name="Visited_20_Internet_20_Link">PaulOcho26</text:a>/<text:a xlink:type="simple" xlink:href="https://github.com/PaulOcho26/l-empreinte-shiatsu-sf" text:style-name="Internet_20_link" text:visited-style-name="Visited_20_Internet_20_Link">l-empreinte-shiatsu-sf</text:a></text:p>
      <text:p text:style-name="Text_20_body">Public</text:p>
      <text:h text:style-name="Heading_20_2" text:outline-level="2"><text:soft-page-break/>Description</text:h>
      <text:p text:style-name="P7"><draw:a xlink:type="simple" xlink:href="https://github.com/PaulOcho26"><draw:frame draw:style-name="fr1" draw:name="Image5" text:anchor-type="as-char" svg:width="0.688cm" svg:height="0.688cm" draw:z-index="4"><draw:image xlink:href="Pictures/10000000000001A4000001A456A5BA770121189B.png" xlink:type="simple" xlink:show="embed" xlink:actuate="onLoad" draw:mime-type="image/png"/><svg:title>@PaulOcho26</svg:title></draw:frame></draw:a></text:p>
      <text:p text:style-name="P7"><text:a xlink:type="simple" xlink:href="https://github.com/PaulOcho26" text:style-name="Internet_20_link" text:visited-style-name="Visited_20_Internet_20_Link">PaulOcho26</text:a></text:p>
      <text:p text:style-name="P7">opened <text:a xlink:type="simple" xlink:href="https://github.com/PaulOcho26/l-empreinte-shiatsu-sf/issues/22#issue-4922035129" text:style-name="Internet_20_link" text:visited-style-name="Visited_20_Internet_20_Link">1d ago</text:a></text:p>
      <text:p text:style-name="P7">Owner</text:p>
      <text:section text:style-name="Sect1" text:name="Section4">
        <text:p text:style-name="Preformatted_20_Text"><text:bookmark text:name="issue-body-viewer4"/><text:span text:style-name="Source_20_Text">Création de la mise en page narrative (éditoriale) pour l'approche de Sandrine Tribhou.</text:span></text:p>
        <text:p text:style-name="Preformatted_20_Text"/>
        <text:p text:style-name="Preformatted_20_Text"><text:span text:style-name="Source_20_Text"><text:s text:c="4"/>Structure en "chicane" asymétrique : Titre et texte alignés à gauche (X=150), Image principale alignée à droite (X=530).</text:span></text:p>
        <text:p text:style-name="Preformatted_20_Text"/>
        <text:p text:style-name="Preformatted_20_Text"><text:span text:style-name="Source_20_Text"><text:s text:c="4"/>Application des styles "Livre d'Art" : Texte EB Garamond Justifié, retrait de première ligne (Paragraph indent) de 32px.</text:span></text:p>
        <text:p text:style-name="Preformatted_20_Text"/>
        <text:p text:style-name="P3"><text:span text:style-name="Source_20_Text"><text:s text:c="4"/>Signature visuelle : Lettrine en Zen-Forest (#8A9A5B) de 80px sur le premier paragraphe.</text:span></text:p>
      </text:section>
      <text:p text:style-name="P8">Cela dans dans « done » :</text:p>
      <text:h text:style-name="P2" text:outline-level="1">UI : Maquettage Haute Fidélité - Home &amp; Catalogue (Desktop)</text:h>
      <text:h text:style-name="P2" text:outline-level="1"><text:a xlink:type="simple" xlink:href="https://github.com/PaulOcho26/l-empreinte-shiatsu-sf/issues/16" text:style-name="Internet_20_link" text:visited-style-name="Visited_20_Internet_20_Link">#16</text:a></text:h>
      <text:p text:style-name="P7">Closed</text:p>
      <text:p text:style-name="P7"><text:a xlink:type="simple" xlink:href="https://github.com/PaulOcho26" text:style-name="Internet_20_link" text:visited-style-name="Visited_20_Internet_20_Link">PaulOcho26</text:a>/<text:a xlink:type="simple" xlink:href="https://github.com/PaulOcho26/l-empreinte-shiatsu-sf" text:style-name="Internet_20_link" text:visited-style-name="Visited_20_Internet_20_Link">l-empreinte-shiatsu-sf</text:a></text:p>
      <text:p text:style-name="Text_20_body">Public</text:p>
      <text:h text:style-name="Heading_20_2" text:outline-level="2">Description</text:h>
      <text:p text:style-name="P7"><draw:a xlink:type="simple" xlink:href="https://github.com/PaulOcho26"><draw:frame draw:style-name="fr1" draw:name="Image6" text:anchor-type="as-char" svg:width="0.688cm" svg:height="0.688cm" draw:z-index="5"><draw:image xlink:href="Pictures/10000000000001A4000001A456A5BA770121189B.png" xlink:type="simple" xlink:show="embed" xlink:actuate="onLoad" draw:mime-type="image/png"/><svg:title>@PaulOcho26</svg:title></draw:frame></draw:a></text:p>
      <text:p text:style-name="P7"><text:a xlink:type="simple" xlink:href="https://github.com/PaulOcho26" text:style-name="Internet_20_link" text:visited-style-name="Visited_20_Internet_20_Link">PaulOcho26</text:a></text:p>
      <text:p text:style-name="P7">opened <text:a xlink:type="simple" xlink:href="https://github.com/PaulOcho26/l-empreinte-shiatsu-sf/issues/16#issue-4901583582" text:style-name="Internet_20_link" text:visited-style-name="Visited_20_Internet_20_Link">4d ago</text:a></text:p>
      <text:p text:style-name="P7">Owner</text:p>
      <text:section text:style-name="Sect1" text:name="Section5">
        <text:p text:style-name="P7"><text:bookmark text:name="issue-body-viewer5"/>No description provided.</text:p>
      </text:section>
      <text:p text:style-name="P8"><text:s/>À mon avis c’est à compléter… !</text:p>
      <text:p text:style-name="P8"/>
      <text:p text:style-name="P8"/>
      <text:p text:style-name="P8">Les suivantes dans done aussi :</text:p>
      <text:p text:style-name="P8"/>
      <text:h text:style-name="P2" text:outline-level="1"><text:soft-page-break/>UI : Design de la Grille de Soins Desktop (3 colonnes)</text:h>
      <text:h text:style-name="P2" text:outline-level="1"><text:a xlink:type="simple" xlink:href="https://github.com/PaulOcho26/l-empreinte-shiatsu-sf/issues/21" text:style-name="Internet_20_link" text:visited-style-name="Visited_20_Internet_20_Link">#21</text:a></text:h>
      <text:p text:style-name="P7">Closed</text:p>
      <text:p text:style-name="P7"><text:a xlink:type="simple" xlink:href="https://github.com/PaulOcho26" text:style-name="Internet_20_link" text:visited-style-name="Visited_20_Internet_20_Link">PaulOcho26</text:a>/<text:a xlink:type="simple" xlink:href="https://github.com/PaulOcho26/l-empreinte-shiatsu-sf" text:style-name="Internet_20_link" text:visited-style-name="Visited_20_Internet_20_Link">l-empreinte-shiatsu-sf</text:a></text:p>
      <text:p text:style-name="Text_20_body">Public</text:p>
      <text:h text:style-name="Heading_20_2" text:outline-level="2">Description</text:h>
      <text:p text:style-name="P7"><draw:a xlink:type="simple" xlink:href="https://github.com/PaulOcho26"><draw:frame draw:style-name="fr1" draw:name="Image7" text:anchor-type="as-char" svg:width="0.688cm" svg:height="0.688cm" draw:z-index="6"><draw:image xlink:href="Pictures/10000000000001A4000001A456A5BA770121189B.png" xlink:type="simple" xlink:show="embed" xlink:actuate="onLoad" draw:mime-type="image/png"/><svg:title>@PaulOcho26</svg:title></draw:frame></draw:a></text:p>
      <text:p text:style-name="P7"><text:a xlink:type="simple" xlink:href="https://github.com/PaulOcho26" text:style-name="Internet_20_link" text:visited-style-name="Visited_20_Internet_20_Link">PaulOcho26</text:a></text:p>
      <text:p text:style-name="P7">opened <text:a xlink:type="simple" xlink:href="https://github.com/PaulOcho26/l-empreinte-shiatsu-sf/issues/21#issue-4901818514" text:style-name="Internet_20_link" text:visited-style-name="Visited_20_Internet_20_Link">4d ago</text:a></text:p>
      <text:p text:style-name="P7">Owner</text:p>
      <text:section text:style-name="Sect1" text:name="Section6">
        <text:p text:style-name="Text_20_body"><text:bookmark text:name="issue-body-viewer6"/>Architecture de la grille du catalogue de soins optimisée pour la maintenabilité et la lisibilité.</text:p>
        <text:p text:style-name="Preformatted_20_Text"><text:span text:style-name="Source_20_Text">Structure : Configuration d'un Layout Grid (3 colonnes, marges 150px, gutter 40px) pour incarner la sérénité du vide (ADN Zen-Sand).</text:span></text:p>
        <text:p text:style-name="Preformatted_20_Text"/>
        <text:p text:style-name="Preformatted_20_Text"><text:span text:style-name="Source_20_Text">Conception Atomique : Création du composant maître "Carte de Soin" (Image ratio 3:4, Titre Cormorant Garamond Italic, Infos EB Garamond).</text:span></text:p>
        <text:p text:style-name="Preformatted_20_Text"/>
        <text:p text:style-name="Preformatted_20_Text"><text:span text:style-name="Source_20_Text">Ingénierie UI : Mise en place du Header, Main et Footer en Auto Layout complexe pour assurer un responsive fluide.</text:span></text:p>
        <text:p text:style-name="Preformatted_20_Text"/>
        <text:p text:style-name="Preformatted_20_Text"><text:span text:style-name="Source_20_Text">Maintenance &amp; Autonomie : Application du principe DRY (Don't Repeat Yourself) via les instances de composants, garantissant que Sandrine Tribhou pourra enrichir son catalogue en toute autonomie sans jamais rompre l'harmonie visuelle.</text:span></text:p>
        <text:p text:style-name="Preformatted_20_Text"/>
        <text:p text:style-name="P3"><text:span text:style-name="Source_20_Text">Optimisation : Travail sur le "souffle" visuel pour réduire la charge cognitive du patient.</text:span></text:p>
      </text:section>
      <text:h text:style-name="P2" text:outline-level="1">Dev : Création des Fixtures (Données de test) pour les Soins</text:h>
      <text:h text:style-name="P2" text:outline-level="1"><text:a xlink:type="simple" xlink:href="https://github.com/PaulOcho26/l-empreinte-shiatsu-sf/issues/23" text:style-name="Internet_20_link" text:visited-style-name="Visited_20_Internet_20_Link">#23</text:a></text:h>
      <text:p text:style-name="P7">Closed</text:p>
      <text:p text:style-name="P7"><text:a xlink:type="simple" xlink:href="https://github.com/PaulOcho26" text:style-name="Internet_20_link" text:visited-style-name="Visited_20_Internet_20_Link">PaulOcho26</text:a>/<text:a xlink:type="simple" xlink:href="https://github.com/PaulOcho26/l-empreinte-shiatsu-sf" text:style-name="Internet_20_link" text:visited-style-name="Visited_20_Internet_20_Link">l-empreinte-shiatsu-sf</text:a></text:p>
      <text:p text:style-name="Text_20_body">Public</text:p>
      <text:h text:style-name="Heading_20_2" text:outline-level="2">Description</text:h>
      <text:p text:style-name="P7"><draw:a xlink:type="simple" xlink:href="https://github.com/PaulOcho26"><draw:frame draw:style-name="fr1" draw:name="Image8" text:anchor-type="as-char" svg:width="0.688cm" svg:height="0.688cm" draw:z-index="7"><draw:image xlink:href="Pictures/10000000000001A4000001A456A5BA770121189B.png" xlink:type="simple" xlink:show="embed" xlink:actuate="onLoad" draw:mime-type="image/png"/><svg:title>@PaulOcho26</svg:title></draw:frame></draw:a></text:p>
      <text:p text:style-name="P7"><text:soft-page-break/><text:a xlink:type="simple" xlink:href="https://github.com/PaulOcho26" text:style-name="Internet_20_link" text:visited-style-name="Visited_20_Internet_20_Link">PaulOcho26</text:a></text:p>
      <text:p text:style-name="P7">opened <text:a xlink:type="simple" xlink:href="https://github.com/PaulOcho26/l-empreinte-shiatsu-sf/issues/23#issue-4922038810" text:style-name="Internet_20_link" text:visited-style-name="Visited_20_Internet_20_Link">1d ago</text:a></text:p>
      <text:p text:style-name="P7">Owner</text:p>
      <text:section text:style-name="Sect1" text:name="Section7">
        <text:p text:style-name="Text_20_body"><text:bookmark text:name="issue-body-viewer7"/>Peuplement de la base de données PostgreSQL avec des données réelles pour tester le moteur de l'application.</text:p>
        <text:p text:style-name="Preformatted_20_Text"><text:span text:style-name="Source_20_Text">Utilisation de DoctrineFixturesBundle.</text:span></text:p>
        <text:p text:style-name="Preformatted_20_Text"/>
        <text:p text:style-name="Preformatted_20_Text"><text:span text:style-name="Source_20_Text">Injection de 3 soins types (Shiatsu, MTC, Réflexologie) avec titres, slugs, prix (Decimal) et UUIDs.</text:span></text:p>
        <text:p text:style-name="Preformatted_20_Text"/>
        <text:p text:style-name="P3"><text:span text:style-name="Source_20_Text">Objectif : Permettre l'affichage dynamique du catalogue sur la route /treatments.</text:span></text:p>
      </text:section>
      <text:p text:style-name="P8">Confirmes-moi que tu as VRAIMENT tout ce qu’il te faut comme informations pour que l’on avance professionnelle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0T14:45:26.132995242</meta:creation-date>
    <dc:date>2026-07-20T16:54:06.239268570</dc:date>
    <meta:editing-duration>PT1H47M49S</meta:editing-duration>
    <meta:editing-cycles>1</meta:editing-cycles>
    <meta:document-statistic meta:table-count="0" meta:image-count="8" meta:object-count="0" meta:page-count="7" meta:paragraph-count="152" meta:word-count="1242" meta:character-count="7661" meta:non-whitespace-character-count="6550"/>
    <meta:generator>LibreOffice/7.3.7.2$Linux_X86_64 LibreOffice_project/30$Build-2</meta:generator>
  </office:meta>
</office:document-meta>
</file>