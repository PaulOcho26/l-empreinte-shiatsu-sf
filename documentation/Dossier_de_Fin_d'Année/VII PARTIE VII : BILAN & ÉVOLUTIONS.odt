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rmorant Garamond" svg:font-family="'Cormorant Garamond'" style:font-adornments="Italique" style:font-pitch="variable"/>
    <style:font-face style:name="Cormorant Garamond1" svg:font-family="'Cormorant Garamond'" style:font-adornments="Italique gras" style:font-pitch="variable"/>
    <style:font-face style:name="Cormorant Garamond2" svg:font-family="'Cormorant Garamond'" style:font-adornments="Normal" style:font-pitch="variable"/>
    <style:font-face style:name="EB Garamond" svg:font-family="'EB Garamond'" style:font-pitch="variable"/>
    <style:font-face style:name="EB Garamond1" svg:font-family="'EB Garamond'" style:font-adornments="Norma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paragraph-properties fo:margin-top="0cm" fo:margin-bottom="0cm" style:contextual-spacing="false"/>
    </style:style>
    <style:style style:name="P3" style:family="paragraph" style:parent-style-name="Text_20_body" style:list-style-name="L1"/>
    <style:style style:name="P4" style:family="paragraph" style:parent-style-name="Text_20_body">
      <style:paragraph-properties fo:margin-left="1cm" fo:margin-right="1cm" fo:text-indent="0cm" style:auto-text-indent="false"/>
    </style:style>
    <style:style style:name="P5" style:family="paragraph" style:parent-style-name="Text_20_body">
      <style:paragraph-properties fo:margin-top="0cm" fo:margin-bottom="0cm" style:contextual-spacing="false"/>
      <style:text-properties style:font-name="EB Garamond"/>
    </style:style>
    <style:style style:name="T1" style:family="text">
      <style:text-properties fo:font-style="italic"/>
    </style:style>
    <style:style style:name="T2" style:family="text">
      <style:text-properties style:font-name="EB Garamond"/>
    </style:style>
    <style:style style:name="T3" style:family="text">
      <style:text-properties style:font-name="EB Garamond" fo:font-weight="bold" style:font-weight-asian="bold"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ARTIE VII : BILAN &amp; ÉVOLUTIONS</text:h>
      <text:h text:style-name="Heading_20_2" text:outline-level="2">1. <text:span text:style-name="Titre_5f_Vert">Bilan Personnel et Pédagogique</text:span></text:h>
      <text:h text:style-name="Heading_20_3" text:outline-level="3">1.1 <text:span text:style-name="Titre_5f_Vert">De la conception à la réalisation</text:span></text:h>
      <text:p text:style-name="Text_20_body"/>
      <text:p text:style-name="Text_20_body"><text:span text:style-name="Source_20_Text"><text:span text:style-name="T2">La réalisation du projet </text:span></text:span><text:span text:style-name="Source_20_Text"><text:span text:style-name="T3">L'EMPREINTE</text:span></text:span><text:span text:style-name="Source_20_Text"><text:span text:style-name="T2"> a été une expérience formatrice majeure. Elle m'a permis de mettre en pratique l'intégralité du cycle de développement logiciel : du recueil des besoins (Figma/Wireframes) à la modélisation complexe (PostgreSQL), jusqu'à l'implémentation d'un framework robuste (Symfony 8). </text:span></text:span></text:p>
      <text:p text:style-name="Text_20_body"><text:span text:style-name="Source_20_Text"><text:span text:style-name="T2">Le respect de la méthode "Mobile First" et de la philosophie "Haute Couture" m'a imposé une rigueur extrême dans la structure du code et la gestion de la charge cognitive pour l'utilisateur.</text:span></text:span></text:p>
      <text:p text:style-name="P2"><text:span text:style-name="Source_20_Text"/></text:p>
      <text:h text:style-name="Heading_20_2" text:outline-level="2">2. <text:span text:style-name="Titre_5f_Vert">Évolutions futures du projet</text:span></text:h>
      <text:h text:style-name="Heading_20_3" text:outline-level="3">2.1 <text:span text:style-name="Titre_5f_Vert">Enrichissement de la relation thérapeutique</text:span></text:h>
      <text:p text:style-name="Text_20_body"/>
      <text:p text:style-name="Text_20_body"><text:span text:style-name="Source_20_Text"><text:span text:style-name="T2">Bien que le MVP (Minimum Viable Product) soit opérationnel, l'application est conçue pour évoluer. Plusieurs axes sont déjà identifiés :</text:span></text:span></text:p>
      <text:list xml:id="list796382592" text:style-name="L1">
        <text:list-item>
          <text:p text:style-name="P3"><text:s/>d'anamnèse dématérialisées.</text:p>
        </text:list-item>
        <text:list-item>
          <text:p text:style-name="P3"><text:span text:style-name="Strong_20_Emphasis">Module de statistiques :</text:span> Pour Sandrine Tribhou, un tableau de bord analytique des pathologies les plus rencontrées afin d'affiner sa stratégie pédagogique dans le Sanctuaire.</text:p>
        </text:list-item>
        <text:list-item>
          <text:p text:style-name="P3"><text:span text:style-name="Strong_20_Emphasis">Paiement fractionné :</text:span> Automatisation du prélèvement pour les forfaits de 5 ou 10 séances via l'API Stripe.</text:p>
        </text:list-item>
      </text:list>
      <text:h text:style-name="Heading_20_2" text:outline-level="2" text:is-list-header="true"><text:soft-page-break/>3. <text:span text:style-name="Titre_5f_Vert">Conclusion</text:span></text:h>
      <text:p text:style-name="Text_20_body"/>
      <text:p text:style-name="Text_20_body"><text:span text:style-name="Source_20_Text"><text:span text:style-name="T2">Le projet L'EMPREINTE n'est pas seulement un outil technique ; c'est un prolongement numérique de la main du praticien. En développant cette solution, j'ai appris qu'un code de qualité est un code qui sait se faire oublier au profit de l'expérience humaine. La Synchronicité entre le besoin du patient et l'expertise de la thérapeute est désormais assurée par une infrastructure solide et pérenne.</text:span></text:span></text:p>
      <text:p text:style-name="P5"/>
      <text:h text:style-name="Heading_20_3" text:outline-level="3">💡 Le conseil "Pro" pour votre conclusion orale :</text:h>
      <text:p text:style-name="P4"><text:span text:style-name="T1">"J'ai mené ce projet avec le principe </text:span><text:span text:style-name="Strong_20_Emphasis"><text:span text:style-name="T1">DRY</text:span></text:span><text:span text:style-name="T1"> (Don't Repeat Yourself) en tête. Si mon code est aujourd'hui capable d'évoluer sans tout casser, c'est parce que j'ai passé autant de temps sur les plans (MCD, UML) que sur le clavier."</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rmorant Garamond" svg:font-family="'Cormorant Garamond'" style:font-adornments="Italique" style:font-pitch="variable"/>
    <style:font-face style:name="Cormorant Garamond1" svg:font-family="'Cormorant Garamond'" style:font-adornments="Italique gras" style:font-pitch="variable"/>
    <style:font-face style:name="Cormorant Garamond2" svg:font-family="'Cormorant Garamond'" style:font-adornments="Normal" style:font-pitch="variable"/>
    <style:font-face style:name="EB Garamond" svg:font-family="'EB Garamond'" style:font-pitch="variable"/>
    <style:font-face style:name="EB Garamond1" svg:font-family="'EB Garamond'" style:font-adornments="Norma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1.101cm" fo:margin-bottom="0cm" style:contextual-spacing="false" fo:hyphenation-ladder-count="no-limit" style:page-number="auto"/>
      <style:text-properties fo:color="#2d2926" loext:opacity="100%" style:font-name="Cormorant Garamond2" fo:font-family="'Cormorant Garamond'" style:font-style-name="Normal"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522cm" style:contextual-spacing="false" fo:line-height="115%" fo:text-align="justify" style:justify-single-word="false" fo:text-indent="0.57cm" style:auto-text-indent="false" style:page-number="auto"/>
      <style:text-properties style:font-name="EB Garamond1" fo:font-family="'EB Garamond'" style:font-style-name="Normal"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8a9a5b" loext:opacity="100%" style:font-name="Cormorant Garamond" fo:font-family="'Cormorant Garamond'" style:font-style-name="Italique" style:font-pitch="variable" fo:font-size="32pt" fo:font-style="italic" fo:font-weight="bold" style:font-name-asian="Noto Serif CJK SC" style:font-family-asian="'Noto Serif CJK SC'" style:font-family-generic-asian="system" style:font-pitch-asian="variable" style:font-size-asian="24pt" style:language-asian="zxx" style:country-asian="none"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903cm" fo:margin-bottom="0.215cm" style:contextual-spacing="false"/>
      <style:text-properties fo:color="#2d2926" loext:opacity="100%" style:font-name="Cormorant Garamond1" fo:font-family="'Cormorant Garamond'" style:font-style-name="Italique gras" style:font-pitch="variable" fo:font-size="24pt" fo:font-style="normal"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1.072cm" fo:margin-bottom="0.215cm" style:contextual-spacing="false"/>
      <style:text-properties fo:color="#2d2926" loext:opacity="100%" style:font-name="Cormorant Garamond1" fo:font-family="'Cormorant Garamond'" style:font-style-name="Italique gras" style:font-pitch="variable" fo:font-size="18pt" fo:font-style="italic"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color="#2d2926" loext:opacity="100%" style:font-name="Cormorant Garamond1" fo:font-family="'Cormorant Garamond'" style:font-style-name="Italique gras" style:font-pitch="variable" fo:font-style="italic" fo:font-weight="bold"/>
    </style:style>
    <style:style style:name="Vertical_20_Numbering_20_Symbols" style:display-name="Vertical Numbering Symbols" style:family="text">
      <style:text-properties fo:color="#2d2926" loext:opacity="100%" style:text-rotation-angle="90" style:text-rotation-scale="line-height"/>
    </style:style>
    <style:style style:name="Titre_5f_Vert" style:display-name="Titre_Vert" style:family="text" style:parent-style-name="Strong_20_Emphasis">
      <style:text-properties fo:color="#8a9a5b" loext:opacity="100%"/>
    </style:style>
    <style:style style:name="Drop_20_Caps" style:display-name="Drop Cap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13T15:29:16.980671014</meta:creation-date>
    <dc:date>2026-07-13T16:19:04.723957445</dc:date>
    <meta:editing-duration>PT39M37S</meta:editing-duration>
    <meta:editing-cycles>1</meta:editing-cycles>
    <meta:document-statistic meta:table-count="0" meta:image-count="0" meta:object-count="0" meta:page-count="2" meta:paragraph-count="15" meta:word-count="284" meta:character-count="1812" meta:non-whitespace-character-count="1544"/>
    <meta:generator>LibreOffice/7.3.7.2$Linux_X86_64 LibreOffice_project/30$Build-2</meta:generator>
  </office:meta>
</office:document-meta>
</file>