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paragraph-properties fo:margin-top="0cm" fo:margin-bottom="0cm" style:contextual-spacing="false"/>
      <style:text-properties fo:color="#2d2926" loext:opacity="100%"/>
    </style:style>
    <style:style style:name="T1" style:family="text">
      <style:text-properties officeooo:rsid="0018fc8b"/>
    </style:style>
    <style:style style:name="T2" style:family="text">
      <style:text-properties fo:color="#2d2926" loext:opacity="100%"/>
    </style:style>
    <style:style style:name="T3" style:family="text">
      <style:text-properties fo:color="#2d2926" loext:opacity="100%" fo:font-weight="normal" style:font-weight-asian="normal" style:font-weight-complex="normal"/>
    </style:style>
    <style:style style:name="T4" style:family="text">
      <style:text-properties fo:color="#2d2926" loext:opacity="100%"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VI : RÉALISATION DU FRONT-END (L’Expérience Zen)</text:h>
      <text:h text:style-name="Heading_20_2" text:outline-level="2">1. <text:span text:style-name="Titre_5f_Vert">Intégration du Design System</text:span></text:h>
      <text:h text:style-name="Heading_20_3" text:outline-level="3">1.1 <text:span text:style-name="Titre_5f_Vert">Tailwind CSS v4 : La légèreté du geste</text:span></text:h>
      <text:p text:style-name="Text_20_body"><text:span text:style-name="Titre_5f_Vert"/></text:p>
      <text:p text:style-name="Text_20_body"><text:span text:style-name="Titre_5f_Vert"><text:span text:style-name="T3">Pour l'habillage visuel, j'ai fait le choix de la version v4 de Tailwind CSS. L'innovation majeure de cette version réside dans son nouveau moteur de compilation (écrit en Rust), qui permet une génération de style extrêmement rapide et légère. </text:span></text:span></text:p>
      <text:p text:style-name="Text_20_body"><text:span text:style-name="Titre_5f_Vert"><text:span text:style-name="T3">Ce choix technique m'a permis de définir un thème personnalisé regroupant la palette de couleurs "Organique" et la typographie "Haute Couture" définies lors de la phase de conception. Grâce à cette approche "Utility-First", j'ai pu traduire avec une précision chirurgicale les maquettes Figma sans alourdir le poids final des pages. </text:span></text:span></text:p>
      <text:p text:style-name="Text_20_body"><text:span text:style-name="Titre_5f_Vert"/></text:p>
      <text:h text:style-name="Heading_20_2" text:outline-level="2" text:is-list-header="true">2. <text:span text:style-name="Titre_5f_Vert">Structure et Templating</text:span></text:h>
      <text:h text:style-name="Heading_20_3" text:outline-level="3">2.1 <text:span text:style-name="Titre_5f_Vert">Moteur Twig et Héritage de template</text:span></text:h>
      <text:p text:style-name="Text_20_body"><text:span text:style-name="Titre_5f_Vert"/></text:p>
      <text:p text:style-name="Text_20_body"><text:span text:style-name="Titre_5f_Vert"><text:span text:style-name="T3">L'interface est construite via le moteur de template </text:span></text:span><text:span text:style-name="Titre_5f_Vert"><text:span text:style-name="T4">Twig</text:span></text:span><text:span text:style-name="Titre_5f_Vert"><text:span text:style-name="T3">. J'ai mis en place une structure héritée autour d'un fichier maître : `base.html.twig`.</text:span></text:span></text:p>
      <text:p text:style-name="Text_20_body"><text:span text:style-name="Titre_5f_Vert"><text:span text:style-name="T3">Cette architecture garantit la cohérence visuelle de l'ensemble de l'écosystème. En centralisant le header semi-transparent (Glassmorphism) et le footer dans ce fichier parent, je respecte le principe </text:span></text:span><text:span text:style-name="Titre_5f_Vert"><text:span text:style-name="T4">DRY (Don't Repeat Yourself)</text:span></text:span><text:span text:style-name="Titre_5f_Vert"><text:span text:style-name="T3">. Chaque page spécifique (Home, Catalogue, Sanctuaire) vient simplement "injecter" son contenu propre dans ce cadre sécurisé.</text:span></text:span></text:p>
      <text:p text:style-name="P2"><text:soft-page-break/><text:span text:style-name="Source_20_Text"/></text:p>
      <text:h text:style-name="Heading_20_2" text:outline-level="2">3. <text:span text:style-name="Titre_5f_Vert">Ergonomie et Adaptabilité (Responsive)</text:span></text:h>
      <text:h text:style-name="Heading_20_3" text:outline-level="3">3.1 <text:span text:style-name="Titre_5f_Vert">Approche Mobile-First concrétisée</text:span></text:h>
      <text:p text:style-name="P2"/>
      <text:p text:style-name="P4">Conformément à la stratégie définie en phase d'analyse, l'intégration a été menée avec une priorité pour le support mobile. L'utilisation des "Grids" et du "Flexbox" de Tailwind assure une fluidité totale.</text:p>
      <text:p text:style-name="P4">L'interface s'adapte dynamiquement à la taille de l'écran, transformant la navigation par **Overlay** sur smartphone en un menu élégant et spacieux sur ordinateur. Le "souffle" graphique (espaces blancs) est préservé sur tous les supports pour maintenir l'état de sérénité du visiteur.</text:p>
      <text:h text:style-name="Heading_20_3" text:outline-level="3">💡 Rappel pour ton intégration :</text:h>
      <text:list xml:id="list1421868710" text:style-name="L1">
        <text:list-item>
          <text:p text:style-name="P3"><text:span text:style-name="Strong_20_Emphasis">Titres (H1, H2, H3) :</text:span> Utilise tes nouveaux styles (Vert Forest, Numéros Noirs).</text:p>
        </text:list-item>
        <text:list-item>
          <text:p text:style-name="P3"><text:span text:style-name="Strong_20_Emphasis">Corps de texte :</text:span> EB Garamond, 12pt, <text:span text:style-name="Strong_20_Emphasis">Justifié</text:span>, avec ton retrait de début de paragraphe.</text:p>
        </text:list-item>
        <text:list-item>
          <text:p text:style-name="P3"><text:span text:style-name="Strong_20_Emphasis">Coupure des mots :</text:span> Assure-toi qu'elle est active pour éviter les grands espaces blancs.</text:p>
        </text:list-item>
      </text:list>
      <text:p text:style-name="Text_20_body"><text:span text:style-name="Strong_20_Emphasis">Est-ce que ce texte te convient pour la Partie VI ?</text:span></text:p>
      <text:p text:style-name="Text_20_body">Une fois que tu l'as posé, nous aurons réellement fini cette partie. Il ne restera que le <text:span text:style-name="Strong_20_Emphasis">Bilan (Partie VII)</text:span> avant de retourner sur Figma pour les maquettes Desktop. On valide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101cm" fo:margin-bottom="0cm" style:contextual-spacing="false" fo:hyphenation-ladder-count="no-limit" style:page-number="auto"/>
      <style:text-properties fo:color="#2d2926" loext:opacity="100%" style:font-name="Cormorant Garamond2" fo:font-family="'Cormorant Garamond'" style:font-style-name="Normal"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text-indent="0.57cm" style:auto-text-indent="false" style:page-number="auto"/>
      <style:text-properties style:font-name="EB Garamond" fo:font-family="'EB Garamond'"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3T14:59:59.041589453</meta:creation-date>
    <dc:date>2026-07-13T15:27:10.584937878</dc:date>
    <meta:editing-duration>PT17M1S</meta:editing-duration>
    <meta:editing-cycles>2</meta:editing-cycles>
    <meta:generator>LibreOffice/7.3.7.2$Linux_X86_64 LibreOffice_project/30$Build-2</meta:generator>
    <meta:document-statistic meta:table-count="0" meta:image-count="0" meta:object-count="0" meta:page-count="2" meta:paragraph-count="19" meta:word-count="366" meta:character-count="2350" meta:non-whitespace-character-count="2004"/>
  </office:meta>
</office:document-meta>
</file>