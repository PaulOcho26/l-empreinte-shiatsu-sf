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left="1cm" fo:margin-right="1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'Arborescence Symfony "Haute Couture"</text:h>
      <text:p text:style-name="Text_20_body">Pour votre chapitre "Arborescence" (équivalent de sa page 16), vous devez présenter une structure qui montre que vous maîtrisez le framework. Voici la liste des dossiers clés à mettre en avant et comment les expliquer à l'oral.</text:p>
      <text:h text:style-name="Heading_20_4" text:outline-level="4">Schéma à inclure (simplifié pour le dossier) :</text:h>
      <text:p text:style-name="P6">code Text</text:p>
      <text:section text:style-name="Sect1" text:name="cdk-accordion-child-31">
        <text:p text:style-name="Preformatted_20_Text"><text:span text:style-name="Source_20_Text">l-empreinte-shiatsu-sf/</text:span></text:p>
        <text:p text:style-name="Preformatted_20_Text"><text:span text:style-name="Source_20_Text">├── bin/ <text:s text:c="15"/># Les outils de pilotage (la console Symfony)</text:span></text:p>
        <text:p text:style-name="Preformatted_20_Text"><text:span text:style-name="Source_20_Text">├── config/ <text:s text:c="12"/># Le cerveau (configuration des routes, de la sécurité, des services)</text:span></text:p>
        <text:p text:style-name="Preformatted_20_Text"><text:span text:style-name="Source_20_Text">├── migrations/ <text:s text:c="8"/># L'historique de construction de la base de données</text:span></text:p>
        <text:p text:style-name="Preformatted_20_Text"><text:span text:style-name="Source_20_Text">├── public/ <text:s text:c="12"/># La porte d'entrée (index.php, images, fichiers compilés)</text:span></text:p>
        <text:p text:style-name="Preformatted_20_Text"><text:span text:style-name="Source_20_Text">├── src/ <text:s text:c="15"/># LE CŒUR MÉTIER (Le code PHP)</text:span></text:p>
        <text:p text:style-name="Preformatted_20_Text"><text:span text:style-name="Source_20_Text">│ <text:s text:c="2"/>├── Controller/ <text:s text:c="4"/># Les aiguilleurs (reçoivent les demandes et affichent les pages)</text:span></text:p>
        <text:p text:style-name="Preformatted_20_Text"><text:span text:style-name="Source_20_Text">│ <text:s text:c="2"/>├── Entity/ <text:s text:c="8"/># Les modèles de données (User, Treatment, Article, etc.)</text:span></text:p>
        <text:p text:style-name="Preformatted_20_Text"><text:span text:style-name="Source_20_Text">│ <text:s text:c="2"/>├── Repository/ <text:s text:c="4"/># Les bibliothécaires (cherchent les données en base)</text:span></text:p>
        <text:p text:style-name="Preformatted_20_Text"><text:span text:style-name="Source_20_Text">│ <text:s text:c="2"/>└── DataFixtures/ <text:s text:c="2"/># Le jeu de données de test (Sandrine, Léa, Soins)</text:span></text:p>
        <text:p text:style-name="Preformatted_20_Text"><text:span text:style-name="Source_20_Text">├── templates/ <text:s text:c="9"/># L'habillage visuel (Fichiers Twig / HTML)</text:span></text:p>
        <text:p text:style-name="Preformatted_20_Text"><text:span text:style-name="Source_20_Text">├── compose.yaml <text:s text:c="7"/># L'infrastructure Docker (FrankenPHP, PostgreSQL, pgAdmin)</text:span></text:p>
        <text:p text:style-name="P1"><text:span text:style-name="Source_20_Text">└── .env <text:s text:c="15"/># Les clés secrètes et configurations environnementales</text:span></text:p>
      </text:section>
      <text:p text:style-name="Horizontal_20_Line"/>
      <text:h text:style-name="Heading_20_3" text:outline-level="3">3. Comment expliquer ce rangement au jury (Arguments chocs)</text:h>
      <text:list xml:id="list1246428028" text:style-name="L5">
        <text:list-item>
          <text:p text:style-name="P7"><text:span text:style-name="Strong_20_Emphasis">Le dossier src/Entity :</text:span></text:p>
          <text:p text:style-name="P8">"C'est ici que j'ai défini mes 8 classes PHP. Elles sont le miroir exact de mon MCD Mermaid. Cela permet à Symfony de manipuler des objets plutôt que de simples lignes de texte SQL."</text:p>
        </text:list-item>
        <text:list-item>
          <text:p text:style-name="P7"><text:span text:style-name="Strong_20_Emphasis">Le dossier migrations :</text:span></text:p>
          <text:p text:style-name="P8">"C'est le journal de bord de ma base de données. Chaque modification de structure est enregistrée ici. Cela garantit que mon projet est reproductible à l'identique sur n'importe quelle machine Docker."</text:p>
        </text:list-item>
        <text:list-item>
          <text:p text:style-name="P7"><text:span text:style-name="Strong_20_Emphasis">Le dossier templates :</text:span></text:p>
          <text:p text:style-name="P8">"Contrairement à une architecture éclatée, Symfony centralise mes vues ici. J'utilise l'héritage de template (base.html.twig) pour garantir une cohérence visuelle 'Haute Couture' sur l'ensemble des 21 pages du site."</text:p>
        </text:list-item>
        <text:list-item>
          <text:p text:style-name="P7"><text:span text:style-name="Strong_20_Emphasis">Le fichier compose.yaml :</text:span></text:p>
          <text:p text:style-name="P8">"C'est le plan de mon infrastructure. Il orchestre FrankenPHP pour la rapidité et PostgreSQL pour la robustesse. Tout mon environnement de développement est isolé et professionnel."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09:22:11.787541442</meta:creation-date>
    <dc:date>2026-07-07T10:08:42.140275198</dc:date>
    <meta:editing-duration>PT36M20S</meta:editing-duration>
    <meta:editing-cycles>1</meta:editing-cycles>
    <meta:document-statistic meta:table-count="0" meta:image-count="0" meta:object-count="0" meta:page-count="1" meta:paragraph-count="26" meta:word-count="333" meta:character-count="2207" meta:non-whitespace-character-count="1789"/>
    <meta:generator>LibreOffice/7.3.7.2$Linux_X86_64 LibreOffice_project/30$Build-2</meta:generator>
  </office:meta>
</office:document-meta>
</file>