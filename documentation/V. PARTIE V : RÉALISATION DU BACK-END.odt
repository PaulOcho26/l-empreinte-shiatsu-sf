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2031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1cm" fo:margin-right="1cm" fo:text-indent="0cm" style:auto-text-indent="false"/>
    </style:style>
    <style:style style:name="P5" style:family="paragraph" style:parent-style-name="Text_20_body" style:list-style-name="L3"/>
    <style:style style:name="P6" style:family="paragraph" style:parent-style-name="Text_20_body">
      <style:text-properties officeooo:rsid="0012031e" officeooo:paragraph-rsid="0012031e"/>
    </style:style>
    <style:style style:name="T1" style:family="text">
      <style:text-properties fo:font-style="italic"/>
    </style:style>
    <style:style style:name="T2" style:family="text">
      <style:text-properties officeooo:rsid="0012031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Sera décalée en V car la IV est maintenant : </text:span>CONCEPTION VISUELLE &amp; EXPÉRIENCE UTILISATEUR (UI/UX)</text:h>
      <text:p text:style-name="P6"/>
      <text:h text:style-name="Heading_20_1" text:outline-level="1"/>
      <text:h text:style-name="Heading_20_1" text:outline-level="1"/>
      <text:h text:style-name="Heading_20_1" text:outline-level="1">PARTIE IV : RÉALISATION DU BACK-END</text:h>
      <text:h text:style-name="Heading_20_2" text:outline-level="2">1. Implémentation de la Base de Données</text:h>
      <text:h text:style-name="Heading_20_3" text:outline-level="3">1.1 Du MCD à l’ORM Doctrine</text:h>
      <text:p text:style-name="Text_20_body">La traduction du Modèle Conceptuel de Données (Partie III) vers la base de données réelle a été réalisée grâce à l’<text:span text:style-name="Strong_20_Emphasis">ORM Doctrine</text:span>.<text:line-break/>Au lieu d'écrire des scripts SQL manuellement, j'ai défini des <text:span text:style-name="Strong_20_Emphasis">Entités PHP</text:span>. Ce choix permet de manipuler les données comme des objets, garantissant une meilleure lisibilité et une maintenance simplifiée du code. Chaque entité (User, Treatment, Article, etc.) correspond scrupuleusement à une table physique dans PostgreSQL.</text:p>
      <text:h text:style-name="Heading_20_3" text:outline-level="3">1.2 Le système de Migrations</text:h>
      <text:p text:style-name="Text_20_body">Pour assurer l'évolution de la base de données sans perte de données, j'ai utilisé le système de <text:span text:style-name="Strong_20_Emphasis">Migrations</text:span> de Symfony. Chaque changement de structure (ajout d'un champ wallet ou création d'une relation) fait l'objet d'un fichier de migration versionné. Cela garantit une intégrité totale du schéma sur tous les environnements de développement (Docker).</text:p>
      <text:h text:style-name="Heading_20_2" text:outline-level="2">2. Sécurité et Gestion des accès</text:h>
      <text:h text:style-name="Heading_20_3" text:outline-level="3">2.1 Authentification et Hachage</text:h>
      <text:p text:style-name="Text_20_body">La sécurité de l’écosystème repose sur le composant <text:span text:style-name="Strong_20_Emphasis">Security</text:span> de Symfony 8.</text:p>
      <text:list xml:id="list202353341" text:style-name="L1">
        <text:list-item>
          <text:p text:style-name="P2"><text:span text:style-name="Strong_20_Emphasis">Hachage :</text:span> Les mots de passe ne sont jamais stockés en clair. Ils sont chiffrés via l'algorithme natif (PasswordHasher), rendant les données des patients illisibles en cas d'accès non autorisé à la base.</text:p>
        </text:list-item>
        <text:list-item>
          <text:p text:style-name="P2"><text:span text:style-name="Strong_20_Emphasis">Identifiants UUID :</text:span> Pour renforcer l’anonymat et la sécurité "Haute Couture", j'ai implémenté des <text:span text:style-name="Strong_20_Emphasis">UUID</text:span> (identifiants universels uniques) pour les utilisateurs. Contrairement <text:soft-page-break/>aux IDs classiques (1, 2, 3), un UUID est impossible à prédire, protégeant ainsi la confidentialité du volume de patients du cabinet.</text:p>
        </text:list-item>
      </text:list>
      <text:h text:style-name="Heading_20_3" text:outline-level="3">2.2 Hiérarchie des Rôles</text:h>
      <text:p text:style-name="Text_20_body">Grâce au champ json roles, le système identifie instantanément l'utilisateur :</text:p>
      <text:list xml:id="list3423081963" text:style-name="L2">
        <text:list-item>
          <text:p text:style-name="P3"><text:span text:style-name="Strong_20_Emphasis">ROLE_USER :</text:span> Accès à l'Espace Patient, au Wallet personnel et à l'historique des échanges.</text:p>
        </text:list-item>
        <text:list-item>
          <text:p text:style-name="P3"><text:span text:style-name="Strong_20_Emphasis">ROLE_ADMIN :</text:span> Accès exclusif au Dashboard de gestion, au catalogue de soins, à la rédaction d'articles et à la génération de cartes cadeaux.</text:p>
        </text:list-item>
      </text:list>
      <text:p text:style-name="Horizontal_20_Line"/>
      <text:h text:style-name="Heading_20_3" text:outline-level="3">💡 Le conseil "Pro" pour votre oral :</text:h>
      <text:p text:style-name="Text_20_body">C'est ici que vous placez votre argument massue :</text:p>
      <text:p text:style-name="P4"><text:span text:style-name="T1">"J'ai choisi d'utiliser des </text:span><text:span text:style-name="Strong_20_Emphasis"><text:span text:style-name="T1">UUID</text:span></text:span><text:span text:style-name="T1"> dès la conception. Dans un cadre thérapeutique comme le Shiatsu, la confidentialité commence dès la structure de l'URL. Un patient ne doit pas pouvoir deviner l'ID d'un autre utilisateur en changeant simplement un chiffre dans sa barre d'adresse."</text:span></text:p>
      <text:p text:style-name="Horizontal_20_Line"/>
      <text:h text:style-name="Heading_20_3" text:outline-level="3">ACTION :</text:h>
      <text:list xml:id="list512660456" text:style-name="L3">
        <text:list-item>
          <text:p text:style-name="P5"><text:span text:style-name="Strong_20_Emphasis">Intégrez</text:span> ces deux premiers points (1. Implémentation et 2. Sécurité) dans votre document.</text:p>
        </text:list-item>
        <text:list-item>
          <text:p text:style-name="P5"><text:span text:style-name="Strong_20_Emphasis">Légende suggérée pour plus tard :</text:span> Vous pourrez ajouter ici une capture d'écran de votre dossier src/Entity (pour montrer vos fichiers PHP) ou de votre dossier migrations.</text:p>
        </text:list-item>
      </text:list>
      <text:p text:style-name="Text_20_body"><text:span text:style-name="Strong_20_Emphasis">Une fois ces points posés, nous passerons au point 3 : La Logique Métier (Le Lexique et la Synchronicité).</text:span></text:p>
      <text:p text:style-name="Text_20_body">On valide ce début de Partie IV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5:05:58.786278105</meta:creation-date>
    <dc:date>2026-07-07T16:24:30.737353666</dc:date>
    <meta:editing-duration>PT1H3M53S</meta:editing-duration>
    <meta:editing-cycles>1</meta:editing-cycles>
    <meta:document-statistic meta:table-count="0" meta:image-count="0" meta:object-count="0" meta:page-count="2" meta:paragraph-count="24" meta:word-count="447" meta:character-count="2786" meta:non-whitespace-character-count="2369"/>
    <meta:generator>LibreOffice/7.3.7.2$Linux_X86_64 LibreOffice_project/30$Build-2</meta:generator>
  </office:meta>
</office:document-meta>
</file>