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1cm" fo:margin-right="1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RTIE IV : CONCEPTION VISUELLE &amp; EXPÉRIENCE UTILISATEUR (UI/UX)</text:h>
      <text:p text:style-name="Standard"/>
      <text:p text:style-name="Standard"/>
      <text:h text:style-name="Heading_20_2" text:outline-level="2">1. Philosophie du Design : "Le Souffle et la Précision"</text:h>
      <text:p text:style-name="Text_20_body">Pour refléter l'essence du Shiatsu et de la MTC, le design de <text:span text:style-name="Strong_20_Emphasis">L'EMPREINTE</text:span> repose sur le concept de "Zen haut de gamme". L'accent est mis sur le <text:span text:style-name="Strong_20_Emphasis">vide (le souffle)</text:span> : les espaces blancs ne sont pas des manques, mais des respirations nécessaires à la clarté mentale du visiteur. L'interface est épurée pour minimiser la charge cognitive.</text:p>
      <text:h text:style-name="Heading_20_2" text:outline-level="2">2. Identité Graphique (La Charte)</text:h>
      <text:h text:style-name="Heading_20_3" text:outline-level="3">2.1 Palette de couleurs "Organique"</text:h>
      <text:p text:style-name="Text_20_body">J'ai sélectionné des teintes naturelles évoquant les éléments de la MTC :</text:p>
      <text:list xml:id="list173914994" text:style-name="L1">
        <text:list-item>
          <text:p text:style-name="P2"><text:span text:style-name="Strong_20_Emphasis">Zen-Sand (#F7F1E8) :</text:span> Un beige chaud pour le fond, apportant douceur et confort visuel.</text:p>
        </text:list-item>
        <text:list-item>
          <text:p text:style-name="P2"><text:span text:style-name="Strong_20_Emphasis">Zen-Forest (#8A9A5B) :</text:span> Un vert sauge pour les boutons et les accents, symbolisant la vitalité et l'équilibre.</text:p>
        </text:list-item>
        <text:list-item>
          <text:p text:style-name="P2"><text:span text:style-name="Strong_20_Emphasis">Zen-Ink (#2D2926) :</text:span> Un noir "encre de chine" pour les textes, assurant une lisibilité élégante et profonde.</text:p>
        </text:list-item>
      </text:list>
      <text:h text:style-name="Heading_20_3" text:outline-level="3">2.2 Typographie "Haute Couture"</text:h>
      <text:list xml:id="list2376679796" text:style-name="L2">
        <text:list-item>
          <text:p text:style-name="P3"><text:span text:style-name="Strong_20_Emphasis">Cormorant Garamond :</text:span> Utilisée pour les titres (H1/H2) en italique. Sa finesse évoque la tradition et l'élégance.</text:p>
        </text:list-item>
        <text:list-item>
          <text:p text:style-name="P3"><text:span text:style-name="Strong_20_Emphasis">Montserrat / Inter :</text:span> Utilisée pour les textes techniques et les boutons. Sa modernité assure une parfaite lisibilité sur tous les supports.</text:p>
        </text:list-item>
      </text:list>
      <text:h text:style-name="Heading_20_2" text:outline-level="2">3. Maquettage et Prototypage (Figma)</text:h>
      <text:p text:style-name="Text_20_body">La phase de conception visuelle a été réalisée sur <text:span text:style-name="Strong_20_Emphasis">Figma</text:span>. J’ai développé un prototype de <text:span text:style-name="Strong_20_Emphasis">21 Frames</text:span> couvrant l’intégralité du parcours utilisateur.</text:p>
      <text:h text:style-name="Heading_20_3" text:outline-level="3">3.1 Approche "Mobile First"</text:h>
      <text:p text:style-name="Text_20_body">Conformément aux usages actuels (70% du trafic en bien-être s'effectuant sur smartphone), j'ai d'abord finalisé l'intégralité des maquettes en version mobile. Cette contrainte a permis de prioriser l'essentiel : la clarté de l'information et la rapidité de la prise de rendez-vous.</text:p>
      <text:h text:style-name="Heading_20_3" text:outline-level="3"><text:soft-page-break/>3.2 Navigation : L'Overlay Zen</text:h>
      <text:p text:style-name="Text_20_body">Au lieu d'un menu classique qui surcharge l'écran, j'ai opté pour un <text:span text:style-name="Strong_20_Emphasis">Overlay plein écran</text:span>. Cette interface de navigation utilise un interlignage large (160%) et une barre de recherche intégrée, permettant au visiteur de trouver un soin ou un terme de lexique sans quitter son état de calme.</text:p>
      <text:p text:style-name="Horizontal_20_Line"/>
      <text:h text:style-name="Heading_20_3" text:outline-level="3">💡 Le conseil "Pro" pour votre oral :</text:h>
      <text:p text:style-name="Text_20_body">C'est le moment d'anticiper la partie "Artisan" dont nous parlions :</text:p>
      <text:p text:style-name="P1"><text:span text:style-name="T1">"J'ai mené cette phase avec une approche </text:span><text:span text:style-name="Strong_20_Emphasis"><text:span text:style-name="T1">Mobile First</text:span></text:span><text:span text:style-name="T1">. La prochaine étape de mon dossier illustrera l'adaptation de ce design au format </text:span><text:span text:style-name="Strong_20_Emphasis"><text:span text:style-name="T1">Desktop</text:span></text:span><text:span text:style-name="T1"> (ordinateur), où la lecture du Sanctuaire prendra toute son ampleur sur grand écran."</text:span></text:p>
      <text:p text:style-name="Horizontal_20_Line"/>
      <text:h text:style-name="Heading_20_3" text:outline-level="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7T16:24:39.670622541</meta:creation-date>
    <dc:date>2026-07-07T16:27:23.020734914</dc:date>
    <meta:editing-duration>PT2M4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1" meta:word-count="374" meta:character-count="2324" meta:non-whitespace-character-count="1976"/>
  </office:meta>
</office:document-meta>
</file>